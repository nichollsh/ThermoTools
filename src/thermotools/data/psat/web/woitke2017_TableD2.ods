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56cm"/>
    </style:style>
    <style:style style:name="co2" style:family="table-column">
      <style:table-column-properties fo:break-before="auto" style:column-width="4.821cm"/>
    </style:style>
    <style:style style:name="co3" style:family="table-column">
      <style:table-column-properties fo:break-before="auto" style:column-width="3.9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119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fit_type</text:p>
          </table:table-cell>
          <table:table-cell office:value-type="string" calcext:value-type="string">
            <text:p>density[g/cm3]</text:p>
          </table:table-cell>
          <table:table-cell office:value-type="string" calcext:value-type="string">
            <text:p>temp_min[K]</text:p>
          </table:table-cell>
          <table:table-cell office:value-type="string" calcext:value-type="string">
            <text:p>temp_max[K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td_dev[kJ/mol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2O3[s]</text:p>
          </table:table-cell>
          <table:table-cell office:value-type="float" office:value="5" calcext:value-type="float">
            <text:p>5</text:p>
          </table:table-cell>
          <table:table-cell office:value-type="float" office:value="3.97" calcext:value-type="float">
            <text:p>3.970E+00</text:p>
          </table:table-cell>
          <table:table-cell table:number-columns-repeated="2"/>
          <table:table-cell office:value-type="float" office:value="368836" calcext:value-type="float">
            <text:p>3.688E+05</text:p>
          </table:table-cell>
          <table:table-cell office:value-type="float" office:value="-7.75003" calcext:value-type="float">
            <text:p>-7.750E+00</text:p>
          </table:table-cell>
          <table:table-cell office:value-type="float" office:value="-43.2225" calcext:value-type="float">
            <text:p>-4.322E+01</text:p>
          </table:table-cell>
          <table:table-cell office:value-type="float" office:value="0.00753364" calcext:value-type="float">
            <text:p>7.534E-03</text:p>
          </table:table-cell>
          <table:table-cell office:value-type="float" office:value="-0.000000764141" calcext:value-type="float">
            <text:p>-7.641E-07</text:p>
          </table:table-cell>
          <table:table-cell office:value-type="float" office:value="0.54" calcext:value-type="float">
            <text:p>5.400E-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2O3[l]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0E+00</text:p>
          </table:table-cell>
          <table:table-cell table:number-columns-repeated="2"/>
          <table:table-cell office:value-type="float" office:value="364246" calcext:value-type="float">
            <text:p>3.642E+05</text:p>
          </table:table-cell>
          <table:table-cell office:value-type="float" office:value="-1.63572" calcext:value-type="float">
            <text:p>-1.636E+00</text:p>
          </table:table-cell>
          <table:table-cell office:value-type="float" office:value="-81.3311" calcext:value-type="float">
            <text:p>-8.133E+01</text:p>
          </table:table-cell>
          <table:table-cell office:value-type="float" office:value="0.00251029" calcext:value-type="float">
            <text:p>2.510E-03</text:p>
          </table:table-cell>
          <table:table-cell office:value-type="float" office:value="0.0000000318884" calcext:value-type="float">
            <text:p>3.189E-08</text:p>
          </table:table-cell>
          <table:table-cell office:value-type="float" office:value="1.8" calcext:value-type="float">
            <text:p>1.800E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gAl2O4[s]</text:p>
          </table:table-cell>
          <table:table-cell office:value-type="float" office:value="5" calcext:value-type="float">
            <text:p>5</text:p>
          </table:table-cell>
          <table:table-cell office:value-type="float" office:value="3.58" calcext:value-type="float">
            <text:p>3.580E+00</text:p>
          </table:table-cell>
          <table:table-cell table:number-columns-repeated="2"/>
          <table:table-cell office:value-type="float" office:value="490917" calcext:value-type="float">
            <text:p>4.909E+05</text:p>
          </table:table-cell>
          <table:table-cell office:value-type="float" office:value="-10.1783" calcext:value-type="float">
            <text:p>-1.018E+01</text:p>
          </table:table-cell>
          <table:table-cell office:value-type="float" office:value="-60.9577" calcext:value-type="float">
            <text:p>-6.096E+01</text:p>
          </table:table-cell>
          <table:table-cell office:value-type="float" office:value="0.0100839" calcext:value-type="float">
            <text:p>1.008E-02</text:p>
          </table:table-cell>
          <table:table-cell office:value-type="float" office:value="-0.000000921697" calcext:value-type="float">
            <text:p>-9.217E-07</text:p>
          </table:table-cell>
          <table:table-cell office:value-type="float" office:value="0.57" calcext:value-type="float">
            <text:p>5.700E-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gAl2O4[l]</text:p>
          </table:table-cell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0E+00</text:p>
          </table:table-cell>
          <table:table-cell table:number-columns-repeated="2"/>
          <table:table-cell office:value-type="float" office:value="470478" calcext:value-type="float">
            <text:p>4.705E+05</text:p>
          </table:table-cell>
          <table:table-cell office:value-type="float" office:value="-1.35143" calcext:value-type="float">
            <text:p>-1.351E+00</text:p>
          </table:table-cell>
          <table:table-cell office:value-type="float" office:value="-108.539" calcext:value-type="float">
            <text:p>-1.085E+02</text:p>
          </table:table-cell>
          <table:table-cell office:value-type="float" office:value="0.0027693" calcext:value-type="float">
            <text:p>2.769E-03</text:p>
          </table:table-cell>
          <table:table-cell office:value-type="float" office:value="-0.000000077898" calcext:value-type="float">
            <text:p>-7.790E-08</text:p>
          </table:table-cell>
          <table:table-cell office:value-type="float" office:value="0.86" calcext:value-type="float">
            <text:p>8.600E-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O2[s]</text:p>
          </table:table-cell>
          <table:table-cell office:value-type="float" office:value="3" calcext:value-type="float">
            <text:p>3</text:p>
          </table:table-cell>
          <table:table-cell office:value-type="float" office:value="4.23" calcext:value-type="float">
            <text:p>4.230E+00</text:p>
          </table:table-cell>
          <table:table-cell/>
          <table:table-cell office:value-type="float" office:value="4047" calcext:value-type="float">
            <text:p>4.047E+03</text:p>
          </table:table-cell>
          <table:table-cell office:value-type="float" office:value="-77044.3" calcext:value-type="float">
            <text:p>-7.704E+04</text:p>
          </table:table-cell>
          <table:table-cell office:value-type="float" office:value="40.3144" calcext:value-type="float">
            <text:p>4.031E+01</text:p>
          </table:table-cell>
          <table:table-cell office:value-type="float" office:value="-0.0025914" calcext:value-type="float">
            <text:p>-2.591E-03</text:p>
          </table:table-cell>
          <table:table-cell office:value-type="float" office:value="0.000000602422" calcext:value-type="float">
            <text:p>6.024E-07</text:p>
          </table:table-cell>
          <table:table-cell office:value-type="float" office:value="-0.0000000000686899" calcext:value-type="float">
            <text:p>-6.869E-11</text:p>
          </table:table-cell>
          <table:table-cell office:value-type="float" office:value="0.04" calcext:value-type="float">
            <text:p>4.000E-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O2[l]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00E+00</text:p>
          </table:table-cell>
          <table:table-cell table:number-columns-repeated="2"/>
          <table:table-cell office:value-type="float" office:value="-70781.9" calcext:value-type="float">
            <text:p>-7.078E+04</text:p>
          </table:table-cell>
          <table:table-cell office:value-type="float" office:value="36.8021" calcext:value-type="float">
            <text:p>3.680E+01</text:p>
          </table:table-cell>
          <table:table-cell office:value-type="float" office:value="-0.00129214" calcext:value-type="float">
            <text:p>-1.292E-03</text:p>
          </table:table-cell>
          <table:table-cell office:value-type="float" office:value="-0.0000000687776" calcext:value-type="float">
            <text:p>-6.878E-08</text:p>
          </table:table-cell>
          <table:table-cell office:value-type="float" office:value="0.0000000000189408" calcext:value-type="float">
            <text:p>1.894E-11</text:p>
          </table:table-cell>
          <table:table-cell office:value-type="float" office:value="0.02" calcext:value-type="float">
            <text:p>2.000E-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4O7[s]</text:p>
          </table:table-cell>
          <table:table-cell office:value-type="float" office:value="2" calcext:value-type="float">
            <text:p>2</text:p>
          </table:table-cell>
          <table:table-cell office:value-type="float" office:value="4.19" calcext:value-type="float">
            <text:p>4.190E+00</text:p>
          </table:table-cell>
          <table:table-cell table:number-columns-repeated="2"/>
          <table:table-cell office:value-type="float" office:value="1858210" calcext:value-type="float">
            <text:p>1.858E+06</text:p>
          </table:table-cell>
          <table:table-cell office:value-type="float" office:value="-7061880" calcext:value-type="float">
            <text:p>-7.062E+06</text:p>
          </table:table-cell>
          <table:table-cell office:value-type="float" office:value="1704.29" calcext:value-type="float">
            <text:p>1.704E+03</text:p>
          </table:table-cell>
          <table:table-cell office:value-type="float" office:value="-0.0467044" calcext:value-type="float">
            <text:p>-4.670E-02</text:p>
          </table:table-cell>
          <table:table-cell office:value-type="float" office:value="0.00000471514" calcext:value-type="float">
            <text:p>4.715E-06</text:p>
          </table:table-cell>
          <table:table-cell office:value-type="float" office:value="0.09" calcext:value-type="float">
            <text:p>9.000E-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4O7[l]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0E+00</text:p>
          </table:table-cell>
          <table:table-cell table:number-columns-repeated="2"/>
          <table:table-cell office:value-type="float" office:value="5063840" calcext:value-type="float">
            <text:p>5.064E+06</text:p>
          </table:table-cell>
          <table:table-cell office:value-type="float" office:value="-6891990" calcext:value-type="float">
            <text:p>-6.892E+06</text:p>
          </table:table-cell>
          <table:table-cell office:value-type="float" office:value="1641.08" calcext:value-type="float">
            <text:p>1.641E+03</text:p>
          </table:table-cell>
          <table:table-cell office:value-type="float" office:value="-0.0593652" calcext:value-type="float">
            <text:p>-5.937E-02</text:p>
          </table:table-cell>
          <table:table-cell office:value-type="float" office:value="0.00000464893" calcext:value-type="float">
            <text:p>4.649E-06</text:p>
          </table:table-cell>
          <table:table-cell office:value-type="float" office:value="0.43" calcext:value-type="float">
            <text:p>4.300E-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g2SiO4[s]</text:p>
          </table:table-cell>
          <table:table-cell office:value-type="float" office:value="2" calcext:value-type="float">
            <text:p>2</text:p>
          </table:table-cell>
          <table:table-cell office:value-type="float" office:value="3.21" calcext:value-type="float">
            <text:p>3.210E+00</text:p>
          </table:table-cell>
          <table:table-cell/>
          <table:table-cell office:value-type="float" office:value="5298" calcext:value-type="float">
            <text:p>5.298E+03</text:p>
          </table:table-cell>
          <table:table-cell office:value-type="float" office:value="1701170" calcext:value-type="float">
            <text:p>1.701E+06</text:p>
          </table:table-cell>
          <table:table-cell office:value-type="float" office:value="-3931540" calcext:value-type="float">
            <text:p>-3.932E+06</text:p>
          </table:table-cell>
          <table:table-cell office:value-type="float" office:value="1046.04" calcext:value-type="float">
            <text:p>1.046E+03</text:p>
          </table:table-cell>
          <table:table-cell office:value-type="float" office:value="-0.01773" calcext:value-type="float">
            <text:p>-1.773E-02</text:p>
          </table:table-cell>
          <table:table-cell office:value-type="float" office:value="0.000000718369" calcext:value-type="float">
            <text:p>7.184E-07</text:p>
          </table:table-cell>
          <table:table-cell office:value-type="float" office:value="0.14" calcext:value-type="float">
            <text:p>1.400E-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g2SiO4[l]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0E+00</text:p>
          </table:table-cell>
          <table:table-cell table:number-columns-repeated="2"/>
          <table:table-cell office:value-type="float" office:value="3263020" calcext:value-type="float">
            <text:p>3.263E+06</text:p>
          </table:table-cell>
          <table:table-cell office:value-type="float" office:value="-3876980" calcext:value-type="float">
            <text:p>-3.877E+06</text:p>
          </table:table-cell>
          <table:table-cell office:value-type="float" office:value="1031.52" calcext:value-type="float">
            <text:p>1.032E+03</text:p>
          </table:table-cell>
          <table:table-cell office:value-type="float" office:value="-0.0248587" calcext:value-type="float">
            <text:p>-2.486E-02</text:p>
          </table:table-cell>
          <table:table-cell office:value-type="float" office:value="0.00000167747" calcext:value-type="float">
            <text:p>1.677E-06</text:p>
          </table:table-cell>
          <table:table-cell office:value-type="float" office:value="0.15" calcext:value-type="float">
            <text:p>1.500E-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gSiO3[s]</text:p>
          </table:table-cell>
          <table:table-cell office:value-type="float" office:value="2" calcext:value-type="float">
            <text:p>2</text:p>
          </table:table-cell>
          <table:table-cell office:value-type="float" office:value="3.19" calcext:value-type="float">
            <text:p>3.190E+00</text:p>
          </table:table-cell>
          <table:table-cell table:number-columns-repeated="2"/>
          <table:table-cell office:value-type="float" office:value="1060600" calcext:value-type="float">
            <text:p>1.061E+06</text:p>
          </table:table-cell>
          <table:table-cell office:value-type="float" office:value="-2904010" calcext:value-type="float">
            <text:p>-2.904E+06</text:p>
          </table:table-cell>
          <table:table-cell office:value-type="float" office:value="757.655" calcext:value-type="float">
            <text:p>7.577E+02</text:p>
          </table:table-cell>
          <table:table-cell office:value-type="float" office:value="-0.0137019" calcext:value-type="float">
            <text:p>-1.370E-02</text:p>
          </table:table-cell>
          <table:table-cell office:value-type="float" office:value="0.00000151773" calcext:value-type="float">
            <text:p>1.518E-06</text:p>
          </table:table-cell>
          <table:table-cell office:value-type="float" office:value="1.3" calcext:value-type="float">
            <text:p>1.300E+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SiO3[l]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0E+00</text:p>
          </table:table-cell>
          <table:table-cell table:number-columns-repeated="2"/>
          <table:table-cell office:value-type="float" office:value="2946750" calcext:value-type="float">
            <text:p>2.947E+06</text:p>
          </table:table-cell>
          <table:table-cell office:value-type="float" office:value="-2861040" calcext:value-type="float">
            <text:p>-2.861E+06</text:p>
          </table:table-cell>
          <table:table-cell office:value-type="float" office:value="752.974" calcext:value-type="float">
            <text:p>7.530E+02</text:p>
          </table:table-cell>
          <table:table-cell office:value-type="float" office:value="-0.0255722" calcext:value-type="float">
            <text:p>-2.557E-02</text:p>
          </table:table-cell>
          <table:table-cell office:value-type="float" office:value="0.00000236166" calcext:value-type="float">
            <text:p>2.362E-06</text:p>
          </table:table-cell>
          <table:table-cell office:value-type="float" office:value="0.15" calcext:value-type="float">
            <text:p>1.500E-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[s]</text:p>
          </table:table-cell>
          <table:table-cell office:value-type="float" office:value="3" calcext:value-type="float">
            <text:p>3</text:p>
          </table:table-cell>
          <table:table-cell office:value-type="float" office:value="7.87" calcext:value-type="float">
            <text:p>7.870E+00</text:p>
          </table:table-cell>
          <table:table-cell table:number-columns-repeated="2"/>
          <table:table-cell office:value-type="float" office:value="-49962.2" calcext:value-type="float">
            <text:p>-4.996E+04</text:p>
          </table:table-cell>
          <table:table-cell office:value-type="float" office:value="32.137" calcext:value-type="float">
            <text:p>3.214E+01</text:p>
          </table:table-cell>
          <table:table-cell office:value-type="float" office:value="0.000668363" calcext:value-type="float">
            <text:p>6.684E-04</text:p>
          </table:table-cell>
          <table:table-cell office:value-type="float" office:value="-0.00000113811" calcext:value-type="float">
            <text:p>-1.138E-06</text:p>
          </table:table-cell>
          <table:table-cell office:value-type="float" office:value="0.000000000257277" calcext:value-type="float">
            <text:p>2.573E-10</text:p>
          </table:table-cell>
          <table:table-cell office:value-type="float" office:value="0.05" calcext:value-type="float">
            <text:p>5.000E-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[l]</text:p>
          </table:table-cell>
          <table:table-cell office:value-type="float" office:value="3" calcext:value-type="float">
            <text:p>3</text:p>
          </table:table-cell>
          <table:table-cell office:value-type="float" office:value="6.98" calcext:value-type="float">
            <text:p>6.980E+00</text:p>
          </table:table-cell>
          <table:table-cell table:number-columns-repeated="2"/>
          <table:table-cell office:value-type="float" office:value="-48774.1" calcext:value-type="float">
            <text:p>-4.877E+04</text:p>
          </table:table-cell>
          <table:table-cell office:value-type="float" office:value="32.6355" calcext:value-type="float">
            <text:p>3.264E+01</text:p>
          </table:table-cell>
          <table:table-cell office:value-type="float" office:value="-0.00138271" calcext:value-type="float">
            <text:p>-1.383E-03</text:p>
          </table:table-cell>
          <table:table-cell office:value-type="float" office:value="0.000000109701" calcext:value-type="float">
            <text:p>1.097E-07</text:p>
          </table:table-cell>
          <table:table-cell office:value-type="float" office:value="0" calcext:value-type="float">
            <text:p>0.000E+00</text:p>
          </table:table-cell>
          <table:table-cell office:value-type="float" office:value="0.03" calcext:value-type="float">
            <text:p>3.000E-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2SiO4[s]</text:p>
          </table:table-cell>
          <table:table-cell office:value-type="float" office:value="5" calcext:value-type="float">
            <text:p>5</text:p>
          </table:table-cell>
          <table:table-cell office:value-type="float" office:value="4.39" calcext:value-type="float">
            <text:p>4.390E+00</text:p>
          </table:table-cell>
          <table:table-cell table:number-columns-repeated="2"/>
          <table:table-cell office:value-type="float" office:value="449574" calcext:value-type="float">
            <text:p>4.496E+05</text:p>
          </table:table-cell>
          <table:table-cell office:value-type="float" office:value="-9.27141" calcext:value-type="float">
            <text:p>-9.271E+00</text:p>
          </table:table-cell>
          <table:table-cell office:value-type="float" office:value="-66.15" calcext:value-type="float">
            <text:p>-6.615E+01</text:p>
          </table:table-cell>
          <table:table-cell office:value-type="float" office:value="0.0104125" calcext:value-type="float">
            <text:p>1.041E-02</text:p>
          </table:table-cell>
          <table:table-cell office:value-type="float" office:value="-0.00000109203" calcext:value-type="float">
            <text:p>-1.092E-06</text:p>
          </table:table-cell>
          <table:table-cell office:value-type="float" office:value="0.38" calcext:value-type="float">
            <text:p>3.800E-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S[s]</text:p>
          </table:table-cell>
          <table:table-cell office:value-type="float" office:value="3" calcext:value-type="float">
            <text:p>3</text:p>
          </table:table-cell>
          <table:table-cell office:value-type="float" office:value="4.83" calcext:value-type="float">
            <text:p>4.830E+00</text:p>
          </table:table-cell>
          <table:table-cell table:number-columns-repeated="2"/>
          <table:table-cell office:value-type="float" office:value="-56992.2" calcext:value-type="float">
            <text:p>-5.699E+04</text:p>
          </table:table-cell>
          <table:table-cell office:value-type="float" office:value="38.6753" calcext:value-type="float">
            <text:p>3.868E+01</text:p>
          </table:table-cell>
          <table:table-cell office:value-type="float" office:value="-0.00468301" calcext:value-type="float">
            <text:p>-4.683E-03</text:p>
          </table:table-cell>
          <table:table-cell office:value-type="float" office:value="0.00000103559" calcext:value-type="float">
            <text:p>1.036E-06</text:p>
          </table:table-cell>
          <table:table-cell office:value-type="float" office:value="-0.0000000000842872" calcext:value-type="float">
            <text:p>-8.429E-11</text:p>
          </table:table-cell>
          <table:table-cell office:value-type="float" office:value="0.08" calcext:value-type="float">
            <text:p>8.000E-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S[l]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00E+00</text:p>
          </table:table-cell>
          <table:table-cell table:number-columns-repeated="2"/>
          <table:table-cell office:value-type="float" office:value="-52613.5" calcext:value-type="float">
            <text:p>-5.261E+04</text:p>
          </table:table-cell>
          <table:table-cell office:value-type="float" office:value="34.6138" calcext:value-type="float">
            <text:p>3.461E+01</text:p>
          </table:table-cell>
          <table:table-cell office:value-type="float" office:value="-0.00355056" calcext:value-type="float">
            <text:p>-3.551E-03</text:p>
          </table:table-cell>
          <table:table-cell office:value-type="float" office:value="0.000000759195" calcext:value-type="float">
            <text:p>7.592E-07</text:p>
          </table:table-cell>
          <table:table-cell office:value-type="float" office:value="-0.0000000000694708" calcext:value-type="float">
            <text:p>-6.947E-11</text:p>
          </table:table-cell>
          <table:table-cell office:value-type="float" office:value="0.08" calcext:value-type="float">
            <text:p>8.000E-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gTi2O5[s]</text:p>
          </table:table-cell>
          <table:table-cell office:value-type="float" office:value="2" calcext:value-type="float">
            <text:p>2</text:p>
          </table:table-cell>
          <table:table-cell office:value-type="float" office:value="4.64" calcext:value-type="float">
            <text:p>4.640E+00</text:p>
          </table:table-cell>
          <table:table-cell/>
          <table:table-cell office:value-type="float" office:value="5318" calcext:value-type="float">
            <text:p>5.318E+03</text:p>
          </table:table-cell>
          <table:table-cell office:value-type="float" office:value="2127420" calcext:value-type="float">
            <text:p>2.127E+06</text:p>
          </table:table-cell>
          <table:table-cell office:value-type="float" office:value="-4865740" calcext:value-type="float">
            <text:p>-4.866E+06</text:p>
          </table:table-cell>
          <table:table-cell office:value-type="float" office:value="1216.37" calcext:value-type="float">
            <text:p>1.216E+03</text:p>
          </table:table-cell>
          <table:table-cell office:value-type="float" office:value="-0.0234246" calcext:value-type="float">
            <text:p>-2.342E-02</text:p>
          </table:table-cell>
          <table:table-cell office:value-type="float" office:value="0.000000839658" calcext:value-type="float">
            <text:p>8.397E-07</text:p>
          </table:table-cell>
          <table:table-cell office:value-type="float" office:value="0.4" calcext:value-type="float">
            <text:p>4.000E-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gTi2O5[l]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00E+00</text:p>
          </table:table-cell>
          <table:table-cell table:number-columns-repeated="2"/>
          <table:table-cell office:value-type="float" office:value="5494850" calcext:value-type="float">
            <text:p>5.495E+06</text:p>
          </table:table-cell>
          <table:table-cell office:value-type="float" office:value="-4758030" calcext:value-type="float">
            <text:p>-4.758E+06</text:p>
          </table:table-cell>
          <table:table-cell office:value-type="float" office:value="1186.02" calcext:value-type="float">
            <text:p>1.186E+03</text:p>
          </table:table-cell>
          <table:table-cell office:value-type="float" office:value="-0.040829" calcext:value-type="float">
            <text:p>-4.083E-02</text:p>
          </table:table-cell>
          <table:table-cell office:value-type="float" office:value="0.00000308428" calcext:value-type="float">
            <text:p>3.084E-06</text:p>
          </table:table-cell>
          <table:table-cell office:value-type="float" office:value="0.32" calcext:value-type="float">
            <text:p>3.200E-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[s]</text:p>
          </table:table-cell>
          <table:table-cell office:value-type="float" office:value="4" calcext:value-type="float">
            <text:p>4</text:p>
          </table:table-cell>
          <table:table-cell office:value-type="float" office:value="2.27" calcext:value-type="float">
            <text:p>2.270E+00</text:p>
          </table:table-cell>
          <table:table-cell table:number-columns-repeated="2"/>
          <table:table-cell office:value-type="float" office:value="32.786" calcext:value-type="float">
            <text:p>3.279E+01</text:p>
          </table:table-cell>
          <table:table-cell office:value-type="float" office:value="-86513.9" calcext:value-type="float">
            <text:p>-8.651E+04</text:p>
          </table:table-cell>
          <table:table-cell office:value-type="float" office:value="0.480395" calcext:value-type="float">
            <text:p>4.804E-01</text:p>
          </table:table-cell>
          <table:table-cell table:number-columns-repeated="2" office:value-type="float" office:value="0" calcext:value-type="float">
            <text:p>0.000E+00</text:p>
          </table:table-cell>
          <table:table-cell office:value-type="float" office:value="0.06" calcext:value-type="float">
            <text:p>6.000E-0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iC[s]</text:p>
          </table:table-cell>
          <table:table-cell office:value-type="float" office:value="2" calcext:value-type="float">
            <text:p>2</text:p>
          </table:table-cell>
          <table:table-cell office:value-type="float" office:value="4.93" calcext:value-type="float">
            <text:p>4.930E+00</text:p>
          </table:table-cell>
          <table:table-cell/>
          <table:table-cell office:value-type="float" office:value="6425" calcext:value-type="float">
            <text:p>6.425E+03</text:p>
          </table:table-cell>
          <table:table-cell office:value-type="float" office:value="111878" calcext:value-type="float">
            <text:p>1.119E+05</text:p>
          </table:table-cell>
          <table:table-cell office:value-type="float" office:value="-1376120" calcext:value-type="float">
            <text:p>-1.376E+06</text:p>
          </table:table-cell>
          <table:table-cell office:value-type="float" office:value="320.666" calcext:value-type="float">
            <text:p>3.207E+02</text:p>
          </table:table-cell>
          <table:table-cell office:value-type="float" office:value="-0.00463379" calcext:value-type="float">
            <text:p>-4.634E-03</text:p>
          </table:table-cell>
          <table:table-cell office:value-type="float" office:value="0.000000185306" calcext:value-type="float">
            <text:p>1.853E-07</text:p>
          </table:table-cell>
          <table:table-cell office:value-type="float" office:value="0.32" calcext:value-type="float">
            <text:p>3.200E-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C[l]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00E+00</text:p>
          </table:table-cell>
          <table:table-cell table:number-columns-repeated="2"/>
          <table:table-cell office:value-type="float" office:value="534201" calcext:value-type="float">
            <text:p>5.342E+05</text:p>
          </table:table-cell>
          <table:table-cell office:value-type="float" office:value="-1302890" calcext:value-type="float">
            <text:p>-1.303E+06</text:p>
          </table:table-cell>
          <table:table-cell office:value-type="float" office:value="301.268" calcext:value-type="float">
            <text:p>3.013E+02</text:p>
          </table:table-cell>
          <table:table-cell office:value-type="float" office:value="-0.00661621" calcext:value-type="float">
            <text:p>-6.616E-03</text:p>
          </table:table-cell>
          <table:table-cell office:value-type="float" office:value="0.000000521065" calcext:value-type="float">
            <text:p>5.211E-07</text:p>
          </table:table-cell>
          <table:table-cell office:value-type="float" office:value="0.03" calcext:value-type="float">
            <text:p>3.000E-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C[s]</text:p>
          </table:table-cell>
          <table:table-cell office:value-type="float" office:value="2" calcext:value-type="float">
            <text:p>2</text:p>
          </table:table-cell>
          <table:table-cell office:value-type="float" office:value="3.21" calcext:value-type="float">
            <text:p>3.210E+00</text:p>
          </table:table-cell>
          <table:table-cell table:number-columns-repeated="2"/>
          <table:table-cell office:value-type="float" office:value="673337" calcext:value-type="float">
            <text:p>6.733E+05</text:p>
          </table:table-cell>
          <table:table-cell office:value-type="float" office:value="-1243810" calcext:value-type="float">
            <text:p>-1.244E+06</text:p>
          </table:table-cell>
          <table:table-cell office:value-type="float" office:value="321.779" calcext:value-type="float">
            <text:p>3.218E+02</text:p>
          </table:table-cell>
          <table:table-cell office:value-type="float" office:value="-0.00454405" calcext:value-type="float">
            <text:p>-4.544E-03</text:p>
          </table:table-cell>
          <table:table-cell office:value-type="float" office:value="0.000000269711" calcext:value-type="float">
            <text:p>2.697E-07</text:p>
          </table:table-cell>
          <table:table-cell office:value-type="float" office:value="0.07" calcext:value-type="float">
            <text:p>7.000E-0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O[s]</text:p>
          </table:table-cell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.180E+00</text:p>
          </table:table-cell>
          <table:table-cell table:number-columns-repeated="2"/>
          <table:table-cell office:value-type="float" office:value="-49520" calcext:value-type="float">
            <text:p>-4.952E+04</text:p>
          </table:table-cell>
          <table:table-cell office:value-type="float" office:value="32.52" calcext:value-type="float">
            <text:p>3.252E+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O2[s]</text:p>
          </table:table-cell>
          <table:table-cell office:value-type="float" office:value="3" calcext:value-type="float">
            <text:p>3</text:p>
          </table:table-cell>
          <table:table-cell office:value-type="float" office:value="2.65" calcext:value-type="float">
            <text:p>2.650E+00</text:p>
          </table:table-cell>
          <table:table-cell table:number-columns-repeated="2"/>
          <table:table-cell office:value-type="float" office:value="-72808.6" calcext:value-type="float">
            <text:p>-7.281E+04</text:p>
          </table:table-cell>
          <table:table-cell office:value-type="float" office:value="36.5312" calcext:value-type="float">
            <text:p>3.653E+01</text:p>
          </table:table-cell>
          <table:table-cell office:value-type="float" office:value="-0.000256109" calcext:value-type="float">
            <text:p>-2.561E-04</text:p>
          </table:table-cell>
          <table:table-cell office:value-type="float" office:value="-0.00000052498" calcext:value-type="float">
            <text:p>-5.250E-07</text:p>
          </table:table-cell>
          <table:table-cell office:value-type="float" office:value="0.000000000153343" calcext:value-type="float">
            <text:p>1.533E-10</text:p>
          </table:table-cell>
          <table:table-cell office:value-type="float" office:value="0.08" calcext:value-type="float">
            <text:p>8.000E-0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O2[l]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00E+00</text:p>
          </table:table-cell>
          <table:table-cell table:number-columns-repeated="2"/>
          <table:table-cell office:value-type="float" office:value="-71859.1" calcext:value-type="float">
            <text:p>-7.186E+04</text:p>
          </table:table-cell>
          <table:table-cell office:value-type="float" office:value="35.957" calcext:value-type="float">
            <text:p>3.596E+01</text:p>
          </table:table-cell>
          <table:table-cell office:value-type="float" office:value="-0.000657765" calcext:value-type="float">
            <text:p>-6.578E-04</text:p>
          </table:table-cell>
          <table:table-cell office:value-type="float" office:value="-0.0000000378705" calcext:value-type="float">
            <text:p>-3.787E-08</text:p>
          </table:table-cell>
          <table:table-cell office:value-type="float" office:value="0.00000000000878339" calcext:value-type="float">
            <text:p>8.783E-12</text:p>
          </table:table-cell>
          <table:table-cell office:value-type="float" office:value="0.08" calcext:value-type="float">
            <text:p>8.000E-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r[s]</text:p>
          </table:table-cell>
          <table:table-cell office:value-type="float" office:value="3" calcext:value-type="float">
            <text:p>3</text:p>
          </table:table-cell>
          <table:table-cell office:value-type="float" office:value="6.52" calcext:value-type="float">
            <text:p>6.520E+00</text:p>
          </table:table-cell>
          <table:table-cell/>
          <table:table-cell office:value-type="float" office:value="3565" calcext:value-type="float">
            <text:p>3.565E+03</text:p>
          </table:table-cell>
          <table:table-cell office:value-type="float" office:value="-72881.6" calcext:value-type="float">
            <text:p>-7.288E+04</text:p>
          </table:table-cell>
          <table:table-cell office:value-type="float" office:value="31.1094" calcext:value-type="float">
            <text:p>3.111E+01</text:p>
          </table:table-cell>
          <table:table-cell office:value-type="float" office:value="-0.000694825" calcext:value-type="float">
            <text:p>-6.948E-04</text:p>
          </table:table-cell>
          <table:table-cell office:value-type="float" office:value="0.000000242125" calcext:value-type="float">
            <text:p>2.421E-07</text:p>
          </table:table-cell>
          <table:table-cell office:value-type="float" office:value="-0.0000000000355274" calcext:value-type="float">
            <text:p>-3.553E-11</text:p>
          </table:table-cell>
          <table:table-cell office:value-type="float" office:value="0.01" calcext:value-type="float">
            <text:p>1.000E-0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r[l]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00E+00</text:p>
          </table:table-cell>
          <table:table-cell/>
          <table:table-cell table:style-name="Default"/>
          <table:table-cell office:value-type="float" office:value="-71414.4" calcext:value-type="float">
            <text:p>-7.141E+04</text:p>
          </table:table-cell>
          <table:table-cell office:value-type="float" office:value="30.6541" calcext:value-type="float">
            <text:p>3.065E+01</text:p>
          </table:table-cell>
          <table:table-cell office:value-type="float" office:value="-0.000547166" calcext:value-type="float">
            <text:p>-5.472E-04</text:p>
          </table:table-cell>
          <table:table-cell office:value-type="float" office:value="0.0000000459756" calcext:value-type="float">
            <text:p>4.598E-08</text:p>
          </table:table-cell>
          <table:table-cell office:value-type="float" office:value="-0.000000000000940737" calcext:value-type="float">
            <text:p>-9.407E-13</text:p>
          </table:table-cell>
          <table:table-cell office:value-type="float" office:value="0.02" calcext:value-type="float">
            <text:p>2.000E-02</text:p>
          </table:table-cell>
          <table:table-cell table:style-name="ce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ZrO2[s]</text:p>
          </table:table-cell>
          <table:table-cell office:value-type="float" office:value="3" calcext:value-type="float">
            <text:p>3</text:p>
          </table:table-cell>
          <table:table-cell office:value-type="float" office:value="5.68" calcext:value-type="float">
            <text:p>5.680E+00</text:p>
          </table:table-cell>
          <table:table-cell/>
          <table:table-cell table:style-name="Default"/>
          <table:table-cell office:value-type="float" office:value="-97723.8" calcext:value-type="float">
            <text:p>-9.772E+04</text:p>
          </table:table-cell>
          <table:table-cell office:value-type="float" office:value="41.8463" calcext:value-type="float">
            <text:p>4.185E+01</text:p>
          </table:table-cell>
          <table:table-cell office:value-type="float" office:value="-0.00222011" calcext:value-type="float">
            <text:p>-2.220E-03</text:p>
          </table:table-cell>
          <table:table-cell office:value-type="float" office:value="0.000000320813" calcext:value-type="float">
            <text:p>3.208E-07</text:p>
          </table:table-cell>
          <table:table-cell office:value-type="float" office:value="-0.0000000000160657" calcext:value-type="float">
            <text:p>-1.607E-11</text:p>
          </table:table-cell>
          <table:table-cell office:value-type="float" office:value="0.06" calcext:value-type="float">
            <text:p>6.000E-02</text:p>
          </table:table-cell>
          <table:table-cell table:style-name="ce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rO2[l]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.000E+00</text:p>
          </table:table-cell>
          <table:table-cell/>
          <table:table-cell table:style-name="Default"/>
          <table:table-cell office:value-type="float" office:value="-88728.6" calcext:value-type="float">
            <text:p>-8.873E+04</text:p>
          </table:table-cell>
          <table:table-cell office:value-type="float" office:value="38.6685" calcext:value-type="float">
            <text:p>3.867E+01</text:p>
          </table:table-cell>
          <table:table-cell office:value-type="float" office:value="-0.0019495" calcext:value-type="float">
            <text:p>-1.950E-03</text:p>
          </table:table-cell>
          <table:table-cell office:value-type="float" office:value="0.000000238918" calcext:value-type="float">
            <text:p>2.389E-07</text:p>
          </table:table-cell>
          <table:table-cell office:value-type="float" office:value="-0.0000000000143097" calcext:value-type="float">
            <text:p>-1.431E-11</text:p>
          </table:table-cell>
          <table:table-cell office:value-type="float" office:value="0.11" calcext:value-type="float">
            <text:p>1.100E-01</text:p>
          </table:table-cell>
          <table:table-cell table:style-name="ce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ZrSiO4[s]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0E+00</text:p>
          </table:table-cell>
          <table:table-cell/>
          <table:table-cell table:style-name="Default"/>
          <table:table-cell office:value-type="float" office:value="490061" calcext:value-type="float">
            <text:p>4.901E+05</text:p>
          </table:table-cell>
          <table:table-cell office:value-type="float" office:value="-8.78711" calcext:value-type="float">
            <text:p>-8.787E+00</text:p>
          </table:table-cell>
          <table:table-cell office:value-type="float" office:value="-55.2714" calcext:value-type="float">
            <text:p>-5.527E+01</text:p>
          </table:table-cell>
          <table:table-cell office:value-type="float" office:value="0.00861307" calcext:value-type="float">
            <text:p>8.613E-03</text:p>
          </table:table-cell>
          <table:table-cell office:value-type="float" office:value="-0.00000102725" calcext:value-type="float">
            <text:p>-1.027E-06</text:p>
          </table:table-cell>
          <table:table-cell office:value-type="float" office:value="0.26" calcext:value-type="float">
            <text:p>2.600E-01</text:p>
          </table:table-cell>
          <table:table-cell table:style-name="ce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[s]</text:p>
          </table:table-cell>
          <table:table-cell office:value-type="float" office:value="3" calcext:value-type="float">
            <text:p>3</text:p>
          </table:table-cell>
          <table:table-cell office:value-type="float" office:value="19.25" calcext:value-type="float">
            <text:p>1.925E+01</text:p>
          </table:table-cell>
          <table:table-cell/>
          <table:table-cell office:value-type="float" office:value="4431" calcext:value-type="float">
            <text:p>4.431E+03</text:p>
          </table:table-cell>
          <table:table-cell office:value-type="float" office:value="-102351" calcext:value-type="float">
            <text:p>-1.024E+05</text:p>
          </table:table-cell>
          <table:table-cell office:value-type="float" office:value="30.7543" calcext:value-type="float">
            <text:p>3.075E+01</text:p>
          </table:table-cell>
          <table:table-cell office:value-type="float" office:value="-0.00000613643" calcext:value-type="float">
            <text:p>-6.136E-06</text:p>
          </table:table-cell>
          <table:table-cell office:value-type="float" office:value="0.0000000536528" calcext:value-type="float">
            <text:p>5.365E-08</text:p>
          </table:table-cell>
          <table:table-cell office:value-type="float" office:value="-0.0000000000119522" calcext:value-type="float">
            <text:p>-1.195E-11</text:p>
          </table:table-cell>
          <table:table-cell office:value-type="float" office:value="0.03" calcext:value-type="float">
            <text:p>3.000E-0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[l]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7.6" calcext:value-type="float">
            <text:p>17.6</text:p>
          </table:table-cell>
          <table:table-cell/>
          <table:table-cell table:style-name="Default"/>
          <table:table-cell office:value-type="float" office:value="-96686.3" calcext:value-type="float">
            <text:p>-9.669E+04</text:p>
          </table:table-cell>
          <table:table-cell office:value-type="float" office:value="29.0491" calcext:value-type="float">
            <text:p>2.905E+01</text:p>
          </table:table-cell>
          <table:table-cell office:value-type="float" office:value="0.00021126" calcext:value-type="float">
            <text:p>2.113E-04</text:p>
          </table:table-cell>
          <table:table-cell office:value-type="float" office:value="-0.0000000593323" calcext:value-type="float">
            <text:p>-5.933E-08</text:p>
          </table:table-cell>
          <table:table-cell office:value-type="float" office:value="0.00000000000615431" calcext:value-type="float">
            <text:p>6.154E-12</text:p>
          </table:table-cell>
          <table:table-cell office:value-type="float" office:value="0.01" calcext:value-type="float">
            <text:p>1.000E-02</text:p>
          </table:table-cell>
          <table:table-cell table:style-name="ce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O3[s]</text:p>
          </table:table-cell>
          <table:table-cell office:value-type="float" office:value="3" calcext:value-type="float">
            <text:p>3</text:p>
          </table:table-cell>
          <table:table-cell office:value-type="float" office:value="7.16" calcext:value-type="float">
            <text:p>7.160E+00</text:p>
          </table:table-cell>
          <table:table-cell/>
          <table:table-cell office:value-type="float" office:value="3476" calcext:value-type="float">
            <text:p>3.476E+03</text:p>
          </table:table-cell>
          <table:table-cell office:value-type="float" office:value="-66356" calcext:value-type="float">
            <text:p>-6.636E+04</text:p>
          </table:table-cell>
          <table:table-cell office:value-type="float" office:value="40.6161" calcext:value-type="float">
            <text:p>4.062E+01</text:p>
          </table:table-cell>
          <table:table-cell office:value-type="float" office:value="-0.00283452" calcext:value-type="float">
            <text:p>-2.835E-03</text:p>
          </table:table-cell>
          <table:table-cell office:value-type="float" office:value="0.000000633945" calcext:value-type="float">
            <text:p>6.339E-07</text:p>
          </table:table-cell>
          <table:table-cell office:value-type="float" office:value="-0.0000000000773057" calcext:value-type="float">
            <text:p>-7.731E-11</text:p>
          </table:table-cell>
          <table:table-cell office:value-type="float" office:value="0.01" calcext:value-type="float">
            <text:p>1.000E-0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3[l]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Default"/>
          <table:table-cell office:value-type="float" office:value="-59822.6" calcext:value-type="float">
            <text:p>-5.982E+04</text:p>
          </table:table-cell>
          <table:table-cell office:value-type="float" office:value="36.8387" calcext:value-type="float">
            <text:p>3.684E+01</text:p>
          </table:table-cell>
          <table:table-cell office:value-type="float" office:value="-0.00160492" calcext:value-type="float">
            <text:p>-1.605E-03</text:p>
          </table:table-cell>
          <table:table-cell office:value-type="float" office:value="-0.000000333151" calcext:value-type="float">
            <text:p>-3.332E-07</text:p>
          </table:table-cell>
          <table:table-cell office:value-type="float" office:value="0.0000000000809588" calcext:value-type="float">
            <text:p>8.096E-11</text:p>
          </table:table-cell>
          <table:table-cell office:value-type="float" office:value="0.01" calcext:value-type="float">
            <text:p>1.000E-02</text:p>
          </table:table-cell>
          <table:table-cell table:style-name="ce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gO[s]</text:p>
          </table:table-cell>
          <table:table-cell office:value-type="float" office:value="3" calcext:value-type="float">
            <text:p>3</text:p>
          </table:table-cell>
          <table:table-cell office:value-type="float" office:value="3.58" calcext:value-type="float">
            <text:p>3.580E+00</text:p>
          </table:table-cell>
          <table:table-cell/>
          <table:table-cell office:value-type="float" office:value="5782" calcext:value-type="float">
            <text:p>5.782E+03</text:p>
          </table:table-cell>
          <table:table-cell office:value-type="float" office:value="-79183.8" calcext:value-type="float">
            <text:p>-7.918E+04</text:p>
          </table:table-cell>
          <table:table-cell office:value-type="float" office:value="35.7312" calcext:value-type="float">
            <text:p>3.573E+01</text:p>
          </table:table-cell>
          <table:table-cell office:value-type="float" office:value="0.000145021" calcext:value-type="float">
            <text:p>1.450E-04</text:p>
          </table:table-cell>
          <table:table-cell office:value-type="float" office:value="-0.0000000847194" calcext:value-type="float">
            <text:p>-8.472E-08</text:p>
          </table:table-cell>
          <table:table-cell office:value-type="float" office:value="0.00000000000449221" calcext:value-type="float">
            <text:p>4.492E-12</text:p>
          </table:table-cell>
          <table:table-cell office:value-type="float" office:value="0.09" calcext:value-type="float">
            <text:p>9.000E-0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gO[l]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.9" calcext:value-type="float">
            <text:p>2.9</text:p>
          </table:table-cell>
          <table:table-cell/>
          <table:table-cell table:style-name="Default"/>
          <table:table-cell office:value-type="float" office:value="-70743.7" calcext:value-type="float">
            <text:p>-7.074E+04</text:p>
          </table:table-cell>
          <table:table-cell office:value-type="float" office:value="32.5683" calcext:value-type="float">
            <text:p>3.257E+01</text:p>
          </table:table-cell>
          <table:table-cell office:value-type="float" office:value="0.000694583" calcext:value-type="float">
            <text:p>6.946E-04</text:p>
          </table:table-cell>
          <table:table-cell office:value-type="float" office:value="-0.000000271415" calcext:value-type="float">
            <text:p>-2.714E-07</text:p>
          </table:table-cell>
          <table:table-cell office:value-type="float" office:value="0.000000000022458" calcext:value-type="float">
            <text:p>2.246E-11</text:p>
          </table:table-cell>
          <table:table-cell office:value-type="float" office:value="0.04" calcext:value-type="float">
            <text:p>4.000E-02</text:p>
          </table:table-cell>
          <table:table-cell table:style-name="ce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O[s]</text:p>
          </table:table-cell>
          <table:table-cell office:value-type="float" office:value="3" calcext:value-type="float">
            <text:p>3</text:p>
          </table:table-cell>
          <table:table-cell office:value-type="float" office:value="5.99" calcext:value-type="float">
            <text:p>5.990E+00</text:p>
          </table:table-cell>
          <table:table-cell/>
          <table:table-cell table:style-name="Default"/>
          <table:table-cell office:value-type="float" office:value="-63001.8" calcext:value-type="float">
            <text:p>-6.300E+04</text:p>
          </table:table-cell>
          <table:table-cell office:value-type="float" office:value="36.6364" calcext:value-type="float">
            <text:p>3.664E+01</text:p>
          </table:table-cell>
          <table:table-cell office:value-type="float" office:value="-0.0024299" calcext:value-type="float">
            <text:p>-2.430E-03</text:p>
          </table:table-cell>
          <table:table-cell office:value-type="float" office:value="0.000000318636" calcext:value-type="float">
            <text:p>3.186E-07</text:p>
          </table:table-cell>
          <table:table-cell office:value-type="float" office:value="0" calcext:value-type="float">
            <text:p>0.000E+00</text:p>
          </table:table-cell>
          <table:table-cell office:value-type="float" office:value="0.01" calcext:value-type="float">
            <text:p>1.000E-02</text:p>
          </table:table-cell>
          <table:table-cell table:style-name="ce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eO[l]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.5" calcext:value-type="float">
            <text:p>5.5</text:p>
          </table:table-cell>
          <table:table-cell/>
          <table:table-cell table:style-name="Default"/>
          <table:table-cell office:value-type="float" office:value="-60308.6" calcext:value-type="float">
            <text:p>-6.031E+04</text:p>
          </table:table-cell>
          <table:table-cell office:value-type="float" office:value="34.8392" calcext:value-type="float">
            <text:p>3.484E+01</text:p>
          </table:table-cell>
          <table:table-cell office:value-type="float" office:value="-0.00221932" calcext:value-type="float">
            <text:p>-2.219E-03</text:p>
          </table:table-cell>
          <table:table-cell office:value-type="float" office:value="0.000000277859" calcext:value-type="float">
            <text:p>2.779E-07</text:p>
          </table:table-cell>
          <table:table-cell office:value-type="float" office:value="-0.0000000000156828" calcext:value-type="float">
            <text:p>-1.568E-11</text:p>
          </table:table-cell>
          <table:table-cell office:value-type="float" office:value="0.01" calcext:value-type="float">
            <text:p>1.000E-02</text:p>
          </table:table-cell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a2SiO3[s]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00E+00</text:p>
          </table:table-cell>
          <table:table-cell/>
          <table:table-cell office:value-type="float" office:value="3108" calcext:value-type="float">
            <text:p>3.108E+03</text:p>
          </table:table-cell>
          <table:table-cell office:value-type="float" office:value="1314530" calcext:value-type="float">
            <text:p>1.315E+06</text:p>
          </table:table-cell>
          <table:table-cell office:value-type="float" office:value="-2985380" calcext:value-type="float">
            <text:p>-2.985E+06</text:p>
          </table:table-cell>
          <table:table-cell office:value-type="float" office:value="876.91" calcext:value-type="float">
            <text:p>8.769E+02</text:p>
          </table:table-cell>
          <table:table-cell office:value-type="float" office:value="-0.0265571" calcext:value-type="float">
            <text:p>-2.656E-02</text:p>
          </table:table-cell>
          <table:table-cell office:value-type="float" office:value="0.00000115443" calcext:value-type="float">
            <text:p>1.154E-06</text:p>
          </table:table-cell>
          <table:table-cell office:value-type="float" office:value="0.17" calcext:value-type="float">
            <text:p>1.700E-0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a2SiO3[l]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.9" calcext:value-type="float">
            <text:p>1.9</text:p>
          </table:table-cell>
          <table:table-cell/>
          <table:table-cell table:style-name="Default"/>
          <table:table-cell office:value-type="float" office:value="1720920" calcext:value-type="float">
            <text:p>1.721E+06</text:p>
          </table:table-cell>
          <table:table-cell office:value-type="float" office:value="-2938240" calcext:value-type="float">
            <text:p>-2.938E+06</text:p>
          </table:table-cell>
          <table:table-cell office:value-type="float" office:value="849.423" calcext:value-type="float">
            <text:p>8.494E+02</text:p>
          </table:table-cell>
          <table:table-cell office:value-type="float" office:value="-0.0354866" calcext:value-type="float">
            <text:p>-3.549E-02</text:p>
          </table:table-cell>
          <table:table-cell office:value-type="float" office:value="0.00000374762" calcext:value-type="float">
            <text:p>3.748E-06</text:p>
          </table:table-cell>
          <table:table-cell office:value-type="float" office:value="0.09" calcext:value-type="float">
            <text:p>9.000E-02</text:p>
          </table:table-cell>
          <table:table-cell table:style-name="ce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2O[s]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9.300E-01</text:p>
          </table:table-cell>
          <table:table-cell/>
          <table:table-cell office:value-type="float" office:value="747" calcext:value-type="float">
            <text:p>7.470E+02</text:p>
          </table:table-cell>
          <table:table-cell office:value-type="float" office:value="6111.5" calcext:value-type="float">
            <text:p>6.112E+03</text:p>
          </table:table-cell>
          <table:table-cell office:value-type="float" office:value="23.036" calcext:value-type="float">
            <text:p>2.304E+01</text:p>
          </table:table-cell>
          <table:table-cell office:value-type="float" office:value="-333.7" calcext:value-type="float">
            <text:p>-3.337E+02</text:p>
          </table:table-cell>
          <table:table-cell office:value-type="float" office:value="279.82" calcext:value-type="float">
            <text:p>2.798E+0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2O[l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.000E+0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9.8605" calcext:value-type="float">
            <text:p>2.986E+01</text:p>
          </table:table-cell>
          <table:table-cell office:value-type="float" office:value="-3152.2" calcext:value-type="float">
            <text:p>-3.152E+03</text:p>
          </table:table-cell>
          <table:table-cell office:value-type="float" office:value="-7.3037" calcext:value-type="float">
            <text:p>-7.304E+00</text:p>
          </table:table-cell>
          <table:table-cell office:value-type="float" office:value="0.0000000024247" calcext:value-type="float">
            <text:p>2.425E-09</text:p>
          </table:table-cell>
          <table:table-cell office:value-type="float" office:value="0.000001809" calcext:value-type="float">
            <text:p>1.809E-06</text:p>
          </table:table-cell>
          <table:table-cell table:style-name="Default"/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H3[s/l]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8.700E-01</text:p>
          </table:table-cell>
          <table:table-cell/>
          <table:table-cell table:style-name="Default"/>
          <table:table-cell office:value-type="float" office:value="10.53" calcext:value-type="float">
            <text:p>1.053E+01</text:p>
          </table:table-cell>
          <table:table-cell office:value-type="float" office:value="-2161" calcext:value-type="float">
            <text:p>-2.161E+03</text:p>
          </table:table-cell>
          <table:table-cell office:value-type="float" office:value="-86596" calcext:value-type="float">
            <text:p>-8.660E+04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4[s/l]</text:p>
          </table:table-cell>
          <table:table-cell office:value-type="float" office:value="9" calcext:value-type="float">
            <text:p>9</text:p>
          </table:table-cell>
          <table:table-cell office:value-type="float" office:value="0.66" calcext:value-type="float">
            <text:p>6.600E-01</text:p>
          </table:table-cell>
          <table:table-cell/>
          <table:table-cell table:style-name="Default"/>
          <table:table-cell office:value-type="float" office:value="3.9895" calcext:value-type="float">
            <text:p>3.990E+00</text:p>
          </table:table-cell>
          <table:table-cell office:value-type="float" office:value="-443.028" calcext:value-type="float">
            <text:p>-4.430E+02</text:p>
          </table:table-cell>
          <table:table-cell office:value-type="float" office:value="-0.49" calcext:value-type="float">
            <text:p>-4.900E-01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[s/l]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0E+00</text:p>
          </table:table-cell>
          <table:table-cell/>
          <table:table-cell table:style-name="Default"/>
          <table:table-cell office:value-type="float" office:value="51.8145" calcext:value-type="float">
            <text:p>5.181E+01</text:p>
          </table:table-cell>
          <table:table-cell office:value-type="float" office:value="-788.24" calcext:value-type="float">
            <text:p>-7.882E+02</text:p>
          </table:table-cell>
          <table:table-cell office:value-type="float" office:value="-22.734" calcext:value-type="float">
            <text:p>-2.273E+01</text:p>
          </table:table-cell>
          <table:table-cell office:value-type="float" office:value="0.051225" calcext:value-type="float">
            <text:p>5.123E-02</text:p>
          </table:table-cell>
          <table:table-cell office:value-type="float" office:value="0.000000000046603" calcext:value-type="float">
            <text:p>4.660E-11</text:p>
          </table:table-cell>
          <table:table-cell/>
          <table:table-cell table:style-name="ce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2[s/l]</text:p>
          </table:table-cell>
          <table:table-cell office:value-type="float" office:value="6" calcext:value-type="float">
            <text:p>6</text:p>
          </table:table-cell>
          <table:table-cell office:value-type="float" office:value="1.98" calcext:value-type="float">
            <text:p>1.980E+00</text:p>
          </table:table-cell>
          <table:table-cell/>
          <table:table-cell table:style-name="Default"/>
          <table:table-cell office:value-type="float" office:value="35.0187" calcext:value-type="float">
            <text:p>3.502E+01</text:p>
          </table:table-cell>
          <table:table-cell office:value-type="float" office:value="-1511.9" calcext:value-type="float">
            <text:p>-1.512E+03</text:p>
          </table:table-cell>
          <table:table-cell office:value-type="float" office:value="-11.335" calcext:value-type="float">
            <text:p>-1.134E+01</text:p>
          </table:table-cell>
          <table:table-cell office:value-type="float" office:value="0.0093383" calcext:value-type="float">
            <text:p>9.338E-03</text:p>
          </table:table-cell>
          <table:table-cell office:value-type="float" office:value="0.00000000077626" calcext:value-type="float">
            <text:p>7.763E-10</text:p>
          </table:table-cell>
          <table:table-cell/>
          <table:table-cell table:style-name="ce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2SO4[s/l]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.840E+00</text:p>
          </table:table-cell>
          <table:table-cell/>
          <table:table-cell table:style-name="Default"/>
          <table:table-cell office:value-type="float" office:value="970368" calcext:value-type="float">
            <text:p>9.704E+05</text:p>
          </table:table-cell>
          <table:table-cell office:value-type="float" office:value="-2538250" calcext:value-type="float">
            <text:p>-2.538E+06</text:p>
          </table:table-cell>
          <table:table-cell office:value-type="float" office:value="935.422" calcext:value-type="float">
            <text:p>9.354E+02</text:p>
          </table:table-cell>
          <table:table-cell office:value-type="float" office:value="-0.0496224" calcext:value-type="float">
            <text:p>-4.962E-02</text:p>
          </table:table-cell>
          <table:table-cell office:value-type="float" office:value="0" calcext:value-type="float">
            <text:p>0.000E+00</text:p>
          </table:table-cell>
          <table:table-cell office:value-type="float" office:value="0.35" calcext:value-type="float">
            <text:p>3.500E-01</text:p>
          </table:table-cell>
          <table:table-cell table:style-name="ce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a[s]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9.700E-01</text:p>
          </table:table-cell>
          <table:table-cell/>
          <table:table-cell table:style-name="Default"/>
          <table:table-cell office:value-type="float" office:value="-13042.4" calcext:value-type="float">
            <text:p>-1.304E+04</text:p>
          </table:table-cell>
          <table:table-cell office:value-type="float" office:value="27.0281" calcext:value-type="float">
            <text:p>2.703E+01</text:p>
          </table:table-cell>
          <table:table-cell office:value-type="float" office:value="-0.00144654" calcext:value-type="float">
            <text:p>-1.447E-03</text:p>
          </table:table-cell>
          <table:table-cell office:value-type="float" office:value="-0.000000412467" calcext:value-type="float">
            <text:p>-4.125E-07</text:p>
          </table:table-cell>
          <table:table-cell office:value-type="float" office:value="0.000000000386734" calcext:value-type="float">
            <text:p>3.867E-10</text:p>
          </table:table-cell>
          <table:table-cell office:value-type="float" office:value="0" calcext:value-type="float">
            <text:p>0.000E+00</text:p>
          </table:table-cell>
          <table:table-cell table:style-name="ce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a[l]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93" calcext:value-type="float">
            <text:p>0.93</text:p>
          </table:table-cell>
          <table:table-cell/>
          <table:table-cell table:style-name="Default"/>
          <table:table-cell office:value-type="float" office:value="-12649.4" calcext:value-type="float">
            <text:p>-1.265E+04</text:p>
          </table:table-cell>
          <table:table-cell office:value-type="float" office:value="25.856" calcext:value-type="float">
            <text:p>2.586E+01</text:p>
          </table:table-cell>
          <table:table-cell office:value-type="float" office:value="-0.00136371" calcext:value-type="float">
            <text:p>-1.364E-03</text:p>
          </table:table-cell>
          <table:table-cell office:value-type="float" office:value="0.000000263744" calcext:value-type="float">
            <text:p>2.637E-07</text:p>
          </table:table-cell>
          <table:table-cell table:number-columns-repeated="2" office:value-type="float" office:value="0" calcext:value-type="float">
            <text:p>0.000E+00</text:p>
          </table:table-cell>
          <table:table-cell table:style-name="ce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aCl[s]</text:p>
          </table:table-cell>
          <table:table-cell office:value-type="float" office:value="3" calcext:value-type="float">
            <text:p>3</text:p>
          </table:table-cell>
          <table:table-cell office:value-type="float" office:value="2.17" calcext:value-type="float">
            <text:p>2.170E+00</text:p>
          </table:table-cell>
          <table:table-cell/>
          <table:table-cell table:style-name="Default"/>
          <table:table-cell office:value-type="float" office:value="-27914.6" calcext:value-type="float">
            <text:p>-2.791E+04</text:p>
          </table:table-cell>
          <table:table-cell office:value-type="float" office:value="34.6023" calcext:value-type="float">
            <text:p>3.460E+01</text:p>
          </table:table-cell>
          <table:table-cell office:value-type="float" office:value="-0.00311287" calcext:value-type="float">
            <text:p>-3.113E-03</text:p>
          </table:table-cell>
          <table:table-cell office:value-type="float" office:value="0.000000530965" calcext:value-type="float">
            <text:p>5.310E-07</text:p>
          </table:table-cell>
          <table:table-cell office:value-type="float" office:value="-0.00000000000259584" calcext:value-type="float">
            <text:p>-2.596E-12</text:p>
          </table:table-cell>
          <table:table-cell office:value-type="float" office:value="0" calcext:value-type="float">
            <text:p>0.000E+00</text:p>
          </table:table-cell>
          <table:table-cell table:style-name="ce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aCl[l]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3" calcext:value-type="float">
            <text:p>1.3</text:p>
          </table:table-cell>
          <table:table-cell/>
          <table:table-cell table:style-name="Default"/>
          <table:table-cell office:value-type="float" office:value="-24888" calcext:value-type="float">
            <text:p>-2.489E+04</text:p>
          </table:table-cell>
          <table:table-cell office:value-type="float" office:value="31.8494" calcext:value-type="float">
            <text:p>3.185E+01</text:p>
          </table:table-cell>
          <table:table-cell office:value-type="float" office:value="-0.00308748" calcext:value-type="float">
            <text:p>-3.087E-03</text:p>
          </table:table-cell>
          <table:table-cell office:value-type="float" office:value="0.00000048499" calcext:value-type="float">
            <text:p>4.850E-07</text:p>
          </table:table-cell>
          <table:table-cell office:value-type="float" office:value="-0.0000000000260359" calcext:value-type="float">
            <text:p>-2.604E-11</text:p>
          </table:table-cell>
          <table:table-cell office:value-type="float" office:value="0.13" calcext:value-type="float">
            <text:p>1.300E-01</text:p>
          </table:table-cell>
          <table:table-cell table:style-name="ce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Cl[s]</text:p>
          </table:table-cell>
          <table:table-cell office:value-type="float" office:value="3" calcext:value-type="float">
            <text:p>3</text:p>
          </table:table-cell>
          <table:table-cell office:value-type="float" office:value="1.99" calcext:value-type="float">
            <text:p>1.990E+00</text:p>
          </table:table-cell>
          <table:table-cell/>
          <table:table-cell table:style-name="Default"/>
          <table:table-cell office:value-type="float" office:value="-26925" calcext:value-type="float">
            <text:p>-2.693E+04</text:p>
          </table:table-cell>
          <table:table-cell office:value-type="float" office:value="33.9574" calcext:value-type="float">
            <text:p>3.396E+01</text:p>
          </table:table-cell>
          <table:table-cell office:value-type="float" office:value="-0.00204903" calcext:value-type="float">
            <text:p>-2.049E-03</text:p>
          </table:table-cell>
          <table:table-cell office:value-type="float" office:value="-0.000000283957" calcext:value-type="float">
            <text:p>-2.840E-07</text:p>
          </table:table-cell>
          <table:table-cell office:value-type="float" office:value="0.000000000182974" calcext:value-type="float">
            <text:p>1.830E-10</text:p>
          </table:table-cell>
          <table:table-cell office:value-type="float" office:value="0.01" calcext:value-type="float">
            <text:p>1.000E-02</text:p>
          </table:table-cell>
          <table:table-cell table:style-name="ce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Cl[l]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6" calcext:value-type="float">
            <text:p>1.6</text:p>
          </table:table-cell>
          <table:table-cell/>
          <table:table-cell table:style-name="Default"/>
          <table:table-cell office:value-type="float" office:value="-25029.3" calcext:value-type="float">
            <text:p>-2.503E+04</text:p>
          </table:table-cell>
          <table:table-cell office:value-type="float" office:value="33.9453" calcext:value-type="float">
            <text:p>3.395E+01</text:p>
          </table:table-cell>
          <table:table-cell office:value-type="float" office:value="-0.00461815" calcext:value-type="float">
            <text:p>-4.618E-03</text:p>
          </table:table-cell>
          <table:table-cell office:value-type="float" office:value="0.000000736857" calcext:value-type="float">
            <text:p>7.369E-07</text:p>
          </table:table-cell>
          <table:table-cell office:value-type="float" office:value="0" calcext:value-type="float">
            <text:p>0.000E+00</text:p>
          </table:table-cell>
          <table:table-cell office:value-type="float" office:value="0.04" calcext:value-type="float">
            <text:p>4.000E-02</text:p>
          </table:table-cell>
          <table:table-cell table:style-name="ce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[s]</text:p>
          </table:table-cell>
          <table:table-cell office:value-type="float" office:value="3" calcext:value-type="float">
            <text:p>3</text:p>
          </table:table-cell>
          <table:table-cell office:value-type="float" office:value="2.05" calcext:value-type="float">
            <text:p>2.050E+00</text:p>
          </table:table-cell>
          <table:table-cell/>
          <table:table-cell table:style-name="Default"/>
          <table:table-cell office:value-type="float" office:value="-33202" calcext:value-type="float">
            <text:p>-3.320E+04</text:p>
          </table:table-cell>
          <table:table-cell office:value-type="float" office:value="29.098" calcext:value-type="float">
            <text:p>2.910E+01</text:p>
          </table:table-cell>
          <table:table-cell office:value-type="float" office:value="0.00344461" calcext:value-type="float">
            <text:p>3.445E-03</text:p>
          </table:table-cell>
          <table:table-cell office:value-type="float" office:value="-0.00000454179" calcext:value-type="float">
            <text:p>-4.542E-06</text:p>
          </table:table-cell>
          <table:table-cell office:value-type="float" office:value="0.00000000185126" calcext:value-type="float">
            <text:p>1.851E-09</text:p>
          </table:table-cell>
          <table:table-cell office:value-type="float" office:value="0" calcext:value-type="float">
            <text:p>0.000E+00</text:p>
          </table:table-cell>
          <table:table-cell table:style-name="ce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[l]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7" calcext:value-type="float">
            <text:p>1.7</text:p>
          </table:table-cell>
          <table:table-cell/>
          <table:table-cell table:style-name="Default"/>
          <table:table-cell office:value-type="float" office:value="-33260.1" calcext:value-type="float">
            <text:p>-3.326E+04</text:p>
          </table:table-cell>
          <table:table-cell office:value-type="float" office:value="30.7134" calcext:value-type="float">
            <text:p>3.071E+01</text:p>
          </table:table-cell>
          <table:table-cell office:value-type="float" office:value="-0.00201083" calcext:value-type="float">
            <text:p>-2.011E-03</text:p>
          </table:table-cell>
          <table:table-cell office:value-type="float" office:value="0.000000447359" calcext:value-type="float">
            <text:p>4.474E-07</text:p>
          </table:table-cell>
          <table:table-cell office:value-type="float" office:value="0" calcext:value-type="float">
            <text:p>0.000E+00</text:p>
          </table:table-cell>
          <table:table-cell office:value-type="float" office:value="0.04" calcext:value-type="float">
            <text:p>4.000E-02</text:p>
          </table:table-cell>
          <table:table-cell table:style-name="ce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gS[s]</text:p>
          </table:table-cell>
          <table:table-cell office:value-type="float" office:value="2" calcext:value-type="float">
            <text:p>2</text:p>
          </table:table-cell>
          <table:table-cell office:value-type="float" office:value="2.68" calcext:value-type="float">
            <text:p>2.680E+00</text:p>
          </table:table-cell>
          <table:table-cell/>
          <table:table-cell table:style-name="Default"/>
          <table:table-cell office:value-type="float" office:value="-30873.7" calcext:value-type="float">
            <text:p>-3.087E+04</text:p>
          </table:table-cell>
          <table:table-cell office:value-type="float" office:value="-770053" calcext:value-type="float">
            <text:p>-7.701E+05</text:p>
          </table:table-cell>
          <table:table-cell office:value-type="float" office:value="269.294" calcext:value-type="float">
            <text:p>2.693E+02</text:p>
          </table:table-cell>
          <table:table-cell office:value-type="float" office:value="-0.00560302" calcext:value-type="float">
            <text:p>-5.603E-03</text:p>
          </table:table-cell>
          <table:table-cell office:value-type="float" office:value="0.000000338303" calcext:value-type="float">
            <text:p>3.383E-07</text:p>
          </table:table-cell>
          <table:table-cell office:value-type="float" office:value="0.11" calcext:value-type="float">
            <text:p>1.100E-01</text:p>
          </table:table-cell>
          <table:table-cell table:style-name="ce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Cl[s]</text:p>
          </table:table-cell>
          <table:table-cell office:value-type="float" office:value="3" calcext:value-type="float">
            <text:p>3</text:p>
          </table:table-cell>
          <table:table-cell office:value-type="float" office:value="2.07" calcext:value-type="float">
            <text:p>2.070E+00</text:p>
          </table:table-cell>
          <table:table-cell/>
          <table:table-cell table:style-name="Default"/>
          <table:table-cell office:value-type="float" office:value="-25773.3" calcext:value-type="float">
            <text:p>-2.577E+04</text:p>
          </table:table-cell>
          <table:table-cell office:value-type="float" office:value="33.6349" calcext:value-type="float">
            <text:p>3.363E+01</text:p>
          </table:table-cell>
          <table:table-cell office:value-type="float" office:value="-0.00243056" calcext:value-type="float">
            <text:p>-2.431E-03</text:p>
          </table:table-cell>
          <table:table-cell office:value-type="float" office:value="0.000000235233" calcext:value-type="float">
            <text:p>2.352E-07</text:p>
          </table:table-cell>
          <table:table-cell office:value-type="float" office:value="0" calcext:value-type="float">
            <text:p>0.000E+00</text:p>
          </table:table-cell>
          <table:table-cell office:value-type="float" office:value="0.08" calcext:value-type="float">
            <text:p>8.000E-02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Cl[l]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7" calcext:value-type="float">
            <text:p>1.7</text:p>
          </table:table-cell>
          <table:table-cell/>
          <table:table-cell table:style-name="Default"/>
          <table:table-cell office:value-type="float" office:value="-23819.6" calcext:value-type="float">
            <text:p>-2.382E+04</text:p>
          </table:table-cell>
          <table:table-cell office:value-type="float" office:value="32.3179" calcext:value-type="float">
            <text:p>3.232E+01</text:p>
          </table:table-cell>
          <table:table-cell office:value-type="float" office:value="-0.00407306" calcext:value-type="float">
            <text:p>-4.073E-03</text:p>
          </table:table-cell>
          <table:table-cell office:value-type="float" office:value="0.00000100591" calcext:value-type="float">
            <text:p>1.006E-06</text:p>
          </table:table-cell>
          <table:table-cell office:value-type="float" office:value="-0.0000000000965764" calcext:value-type="float">
            <text:p>-9.658E-11</text:p>
          </table:table-cell>
          <table:table-cell office:value-type="float" office:value="0.01" calcext:value-type="float">
            <text:p>1.000E-02</text:p>
          </table:table-cell>
          <table:table-cell table:style-name="ce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iS2[s]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0E+00</text:p>
          </table:table-cell>
          <table:table-cell/>
          <table:table-cell office:value-type="float" office:value="2571" calcext:value-type="float">
            <text:p>2.571E+03</text:p>
          </table:table-cell>
          <table:table-cell office:value-type="float" office:value="-196413" calcext:value-type="float">
            <text:p>-1.964E+05</text:p>
          </table:table-cell>
          <table:table-cell office:value-type="float" office:value="-1217440" calcext:value-type="float">
            <text:p>-1.217E+06</text:p>
          </table:table-cell>
          <table:table-cell office:value-type="float" office:value="429.645" calcext:value-type="float">
            <text:p>4.296E+02</text:p>
          </table:table-cell>
          <table:table-cell office:value-type="float" office:value="-0.0132885" calcext:value-type="float">
            <text:p>-1.329E-02</text:p>
          </table:table-cell>
          <table:table-cell office:value-type="float" office:value="0.000000927515" calcext:value-type="float">
            <text:p>9.275E-07</text:p>
          </table:table-cell>
          <table:table-cell office:value-type="float" office:value="0.01" calcext:value-type="float">
            <text:p>1.000E-0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iS2[l]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.5</text:p>
          </table:table-cell>
          <table:table-cell/>
          <table:table-cell table:style-name="Default"/>
          <table:table-cell office:value-type="float" office:value="545975" calcext:value-type="float">
            <text:p>5.460E+05</text:p>
          </table:table-cell>
          <table:table-cell office:value-type="float" office:value="-1215560" calcext:value-type="float">
            <text:p>-1.216E+06</text:p>
          </table:table-cell>
          <table:table-cell office:value-type="float" office:value="434.344" calcext:value-type="float">
            <text:p>4.343E+02</text:p>
          </table:table-cell>
          <table:table-cell office:value-type="float" office:value="-0.0199379" calcext:value-type="float">
            <text:p>-1.994E-02</text:p>
          </table:table-cell>
          <table:table-cell office:value-type="float" office:value="0.00000231933" calcext:value-type="float">
            <text:p>2.319E-06</text:p>
          </table:table-cell>
          <table:table-cell office:value-type="float" office:value="0.02" calcext:value-type="float">
            <text:p>2.000E-0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Cl3[s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48" calcext:value-type="float">
            <text:p>2.48</text:p>
          </table:table-cell>
          <table:table-cell table:style-name="Default"/>
          <table:table-cell table:style-name="Default" office:value-type="float" office:value="1998" calcext:value-type="float">
            <text:p>1998</text:p>
          </table:table-cell>
          <table:table-cell table:style-name="ce4" office:value-type="float" office:value="417188" calcext:value-type="float">
            <text:p>4.17E+05</text:p>
          </table:table-cell>
          <table:table-cell table:style-name="ce4" office:value-type="float" office:value="-1404250" calcext:value-type="float">
            <text:p>-1.40E+06</text:p>
          </table:table-cell>
          <table:table-cell table:style-name="ce4" office:value-type="float" office:value="568.472" calcext:value-type="float">
            <text:p>5.68E+02</text:p>
          </table:table-cell>
          <table:table-cell table:style-name="ce4" office:value-type="float" office:value="-0.017915" calcext:value-type="float">
            <text:p>-1.79E-02</text:p>
          </table:table-cell>
          <table:table-cell table:style-name="ce4" office:value-type="float" office:value="-0.00000481449" calcext:value-type="float">
            <text:p>-4.81E-06</text:p>
          </table:table-cell>
          <table:table-cell table:style-name="Default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Cl3[l]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4" office:value-type="float" office:value="-1510970" calcext:value-type="float">
            <text:p>-1.51E+06</text:p>
          </table:table-cell>
          <table:table-cell table:style-name="ce4" office:value-type="float" office:value="-1361160" calcext:value-type="float">
            <text:p>-1.36E+06</text:p>
          </table:table-cell>
          <table:table-cell table:style-name="ce4" office:value-type="float" office:value="488.316" calcext:value-type="float">
            <text:p>4.88E+02</text:p>
          </table:table-cell>
          <table:table-cell table:style-name="ce4" office:value-type="float" office:value="-0.0296109" calcext:value-type="float">
            <text:p>-2.96E-02</text:p>
          </table:table-cell>
          <table:table-cell table:style-name="ce4" office:value-type="float" office:value="0.00000395859" calcext:value-type="float">
            <text:p>3.96E-06</text:p>
          </table:table-cell>
          <table:table-cell table:style-name="Default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O[s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35" calcext:value-type="float">
            <text:p>3.35</text:p>
          </table:table-cell>
          <table:table-cell table:style-name="Default" table:number-columns-repeated="2"/>
          <table:table-cell table:style-name="ce4" office:value-type="float" office:value="-49427.5" calcext:value-type="float">
            <text:p>-4.94E+04</text:p>
          </table:table-cell>
          <table:table-cell table:style-name="ce4" office:value-type="float" office:value="-1062290" calcext:value-type="float">
            <text:p>-1.06E+06</text:p>
          </table:table-cell>
          <table:table-cell table:style-name="ce4" office:value-type="float" office:value="281.7" calcext:value-type="float">
            <text:p>2.82E+02</text:p>
          </table:table-cell>
          <table:table-cell table:style-name="ce4" office:value-type="float" office:value="-0.00700317" calcext:value-type="float">
            <text:p>-7.00E-03</text:p>
          </table:table-cell>
          <table:table-cell table:style-name="ce4" office:value-type="float" office:value="0.000000460182" calcext:value-type="float">
            <text:p>4.60E-07</text:p>
          </table:table-cell>
          <table:table-cell table:style-name="Default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O[l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table:number-columns-repeated="2"/>
          <table:table-cell table:style-name="ce4" office:value-type="float" office:value="788379" calcext:value-type="float">
            <text:p>7.88E+05</text:p>
          </table:table-cell>
          <table:table-cell table:style-name="ce4" office:value-type="float" office:value="-987984" calcext:value-type="float">
            <text:p>-9.88E+05</text:p>
          </table:table-cell>
          <table:table-cell table:style-name="ce4" office:value-type="float" office:value="261.388" calcext:value-type="float">
            <text:p>2.61E+02</text:p>
          </table:table-cell>
          <table:table-cell table:style-name="ce4" office:value-type="float" office:value="-0.00844845" calcext:value-type="float">
            <text:p>-8.45E-03</text:p>
          </table:table-cell>
          <table:table-cell table:style-name="ce4" office:value-type="float" office:value="0.000000619197" calcext:value-type="float">
            <text:p>6.19E-07</text:p>
          </table:table-cell>
          <table:table-cell table:style-name="Default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Cl2[s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15" calcext:value-type="float">
            <text:p>2.15</text:p>
          </table:table-cell>
          <table:table-cell table:style-name="Default" table:number-columns-repeated="2"/>
          <table:table-cell table:style-name="ce4" office:value-type="float" office:value="-39159.7" calcext:value-type="float">
            <text:p>-3.92E+04</text:p>
          </table:table-cell>
          <table:table-cell table:style-name="ce4" office:value-type="float" office:value="37.1795" calcext:value-type="float">
            <text:p>3.72E+01</text:p>
          </table:table-cell>
          <table:table-cell table:style-name="ce4" office:value-type="float" office:value="-0.00193815" calcext:value-type="float">
            <text:p>-1.94E-03</text:p>
          </table:table-cell>
          <table:table-cell table:style-name="ce4" office:value-type="float" office:value="0.000000118087" calcext:value-type="float">
            <text:p>1.18E-07</text:p>
          </table:table-cell>
          <table:table-cell table:style-name="ce4" office:value-type="float" office:value="0" calcext:value-type="float">
            <text:p>0.00E+00</text:p>
          </table:table-cell>
          <table:table-cell table:style-name="Default"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Cl2[l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table:number-columns-repeated="2"/>
          <table:table-cell table:style-name="ce4" office:value-type="float" office:value="-36810" calcext:value-type="float">
            <text:p>-3.68E+04</text:p>
          </table:table-cell>
          <table:table-cell table:style-name="ce4" office:value-type="float" office:value="36.1822" calcext:value-type="float">
            <text:p>3.62E+01</text:p>
          </table:table-cell>
          <table:table-cell table:style-name="ce4" office:value-type="float" office:value="-0.00353647" calcext:value-type="float">
            <text:p>-3.54E-03</text:p>
          </table:table-cell>
          <table:table-cell table:style-name="ce4" office:value-type="float" office:value="0.00000050335" calcext:value-type="float">
            <text:p>5.03E-07</text:p>
          </table:table-cell>
          <table:table-cell table:style-name="ce4" office:value-type="float" office:value="-0.0000000000305198" calcext:value-type="float">
            <text:p>-3.05E-11</text:p>
          </table:table-cell>
          <table:table-cell table:style-name="Default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H[s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table:number-columns-repeated="2"/>
          <table:table-cell table:style-name="ce4" office:value-type="float" office:value="-27640.5" calcext:value-type="float">
            <text:p>-2.76E+04</text:p>
          </table:table-cell>
          <table:table-cell table:style-name="ce4" office:value-type="float" office:value="30.76" calcext:value-type="float">
            <text:p>3.08E+01</text:p>
          </table:table-cell>
          <table:table-cell table:style-name="ce4" office:value-type="float" office:value="0.00306028" calcext:value-type="float">
            <text:p>3.06E-03</text:p>
          </table:table-cell>
          <table:table-cell table:style-name="ce4" office:value-type="float" office:value="-0.00000326876" calcext:value-type="float">
            <text:p>-3.27E-06</text:p>
          </table:table-cell>
          <table:table-cell table:style-name="ce4" office:value-type="float" office:value="0.000000000770757" calcext:value-type="float">
            <text:p>7.71E-10</text:p>
          </table:table-cell>
          <table:table-cell table:style-name="Default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H[l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table:number-columns-repeated="2"/>
          <table:table-cell table:style-name="ce4" office:value-type="float" office:value="-26315.5" calcext:value-type="float">
            <text:p>-2.63E+04</text:p>
          </table:table-cell>
          <table:table-cell table:style-name="ce4" office:value-type="float" office:value="33.0329" calcext:value-type="float">
            <text:p>3.30E+01</text:p>
          </table:table-cell>
          <table:table-cell table:style-name="ce4" office:value-type="float" office:value="-0.0037719" calcext:value-type="float">
            <text:p>-3.77E-03</text:p>
          </table:table-cell>
          <table:table-cell table:style-name="ce4" office:value-type="float" office:value="0.000000641033" calcext:value-type="float">
            <text:p>6.41E-07</text:p>
          </table:table-cell>
          <table:table-cell table:style-name="ce4" office:value-type="float" office:value="0" calcext:value-type="float">
            <text:p>0.00E+00</text:p>
          </table:table-cell>
          <table:table-cell table:style-name="Default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gTiO3[s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88" calcext:value-type="float">
            <text:p>3.88</text:p>
          </table:table-cell>
          <table:table-cell table:style-name="Default" table:number-columns-repeated="2"/>
          <table:table-cell table:style-name="ce4" office:value-type="float" office:value="818358" calcext:value-type="float">
            <text:p>8.18E+05</text:p>
          </table:table-cell>
          <table:table-cell table:style-name="ce4" office:value-type="float" office:value="-2948090" calcext:value-type="float">
            <text:p>-2.95E+06</text:p>
          </table:table-cell>
          <table:table-cell table:style-name="ce4" office:value-type="float" office:value="757.824" calcext:value-type="float">
            <text:p>7.58E+02</text:p>
          </table:table-cell>
          <table:table-cell table:style-name="ce4" office:value-type="float" office:value="-0.0156613" calcext:value-type="float">
            <text:p>-1.57E-02</text:p>
          </table:table-cell>
          <table:table-cell table:style-name="ce4" office:value-type="float" office:value="0.0000010151" calcext:value-type="float">
            <text:p>1.02E-06</text:p>
          </table:table-cell>
          <table:table-cell table:style-name="Default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gTiO3[l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table:number-columns-repeated="2"/>
          <table:table-cell table:style-name="ce4" office:value-type="float" office:value="2954470" calcext:value-type="float">
            <text:p>2.95E+06</text:p>
          </table:table-cell>
          <table:table-cell table:style-name="ce4" office:value-type="float" office:value="-2885360" calcext:value-type="float">
            <text:p>-2.89E+06</text:p>
          </table:table-cell>
          <table:table-cell table:style-name="ce4" office:value-type="float" office:value="740.614" calcext:value-type="float">
            <text:p>7.41E+02</text:p>
          </table:table-cell>
          <table:table-cell table:style-name="ce4" office:value-type="float" office:value="-0.0252836" calcext:value-type="float">
            <text:p>-2.53E-02</text:p>
          </table:table-cell>
          <table:table-cell table:style-name="ce4" office:value-type="float" office:value="0.00000186167" calcext:value-type="float">
            <text:p>1.86E-06</text:p>
          </table:table-cell>
          <table:table-cell table:style-name="Default"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2SiO3[s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table:number-columns-repeated="2"/>
          <table:table-cell table:style-name="ce4" office:value-type="float" office:value="1087540" calcext:value-type="float">
            <text:p>1.09E+06</text:p>
          </table:table-cell>
          <table:table-cell table:style-name="ce4" office:value-type="float" office:value="-2934660" calcext:value-type="float">
            <text:p>-2.93E+06</text:p>
          </table:table-cell>
          <table:table-cell table:style-name="ce4" office:value-type="float" office:value="861.167" calcext:value-type="float">
            <text:p>8.61E+02</text:p>
          </table:table-cell>
          <table:table-cell table:style-name="ce4" office:value-type="float" office:value="-0.0366511" calcext:value-type="float">
            <text:p>-3.67E-02</text:p>
          </table:table-cell>
          <table:table-cell table:style-name="ce4" office:value-type="float" office:value="0.00000306399" calcext:value-type="float">
            <text:p>3.06E-06</text:p>
          </table:table-cell>
          <table:table-cell table:style-name="Default"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2SiO3[l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table:number-columns-repeated="2"/>
          <table:table-cell table:style-name="ce4" office:value-type="float" office:value="-2095680" calcext:value-type="float">
            <text:p>-2.10E+06</text:p>
          </table:table-cell>
          <table:table-cell table:style-name="ce4" office:value-type="float" office:value="-2871300" calcext:value-type="float">
            <text:p>-2.87E+06</text:p>
          </table:table-cell>
          <table:table-cell table:style-name="ce4" office:value-type="float" office:value="804.917" calcext:value-type="float">
            <text:p>8.05E+02</text:p>
          </table:table-cell>
          <table:table-cell table:style-name="ce4" office:value-type="float" office:value="-0.0303325" calcext:value-type="float">
            <text:p>-3.03E-02</text:p>
          </table:table-cell>
          <table:table-cell table:style-name="ce4" office:value-type="float" office:value="0.00000275492" calcext:value-type="float">
            <text:p>2.75E-06</text:p>
          </table:table-cell>
          <table:table-cell table:style-name="Default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i[s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.51" calcext:value-type="float">
            <text:p>4.51</text:p>
          </table:table-cell>
          <table:table-cell table:style-name="Default"/>
          <table:table-cell table:style-name="Default" office:value-type="float" office:value="4302" calcext:value-type="float">
            <text:p>4302</text:p>
          </table:table-cell>
          <table:table-cell table:style-name="ce4" office:value-type="float" office:value="131154" calcext:value-type="float">
            <text:p>1.31E+05</text:p>
          </table:table-cell>
          <table:table-cell table:style-name="ce4" office:value-type="float" office:value="-467808" calcext:value-type="float">
            <text:p>-4.68E+05</text:p>
          </table:table-cell>
          <table:table-cell table:style-name="ce4" office:value-type="float" office:value="145.369" calcext:value-type="float">
            <text:p>1.45E+02</text:p>
          </table:table-cell>
          <table:table-cell table:style-name="ce4" office:value-type="float" office:value="-0.00349413" calcext:value-type="float">
            <text:p>-3.49E-03</text:p>
          </table:table-cell>
          <table:table-cell table:style-name="ce4" office:value-type="float" office:value="0" calcext:value-type="float">
            <text:p>0.00E+00</text:p>
          </table:table-cell>
          <table:table-cell table:style-name="Default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i[l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.14" calcext:value-type="float">
            <text:p>4.14</text:p>
          </table:table-cell>
          <table:table-cell table:style-name="Default" table:number-columns-repeated="2"/>
          <table:table-cell table:style-name="ce4" office:value-type="float" office:value="1729690" calcext:value-type="float">
            <text:p>1.73E+06</text:p>
          </table:table-cell>
          <table:table-cell table:style-name="ce4" office:value-type="float" office:value="-468384" calcext:value-type="float">
            <text:p>-4.68E+05</text:p>
          </table:table-cell>
          <table:table-cell table:style-name="ce4" office:value-type="float" office:value="154.389" calcext:value-type="float">
            <text:p>1.54E+02</text:p>
          </table:table-cell>
          <table:table-cell table:style-name="ce4" office:value-type="float" office:value="-0.00964953" calcext:value-type="float">
            <text:p>-9.65E-03</text:p>
          </table:table-cell>
          <table:table-cell table:style-name="ce4" office:value-type="float" office:value="0.000000721551" calcext:value-type="float">
            <text:p>7.22E-07</text:p>
          </table:table-cell>
          <table:table-cell table:style-name="Default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O[s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95" calcext:value-type="float">
            <text:p>4.95</text:p>
          </table:table-cell>
          <table:table-cell table:style-name="Default" table:number-columns-repeated="2"/>
          <table:table-cell table:style-name="ce4" office:value-type="float" office:value="-71401.3" calcext:value-type="float">
            <text:p>-7.14E+04</text:p>
          </table:table-cell>
          <table:table-cell table:style-name="ce4" office:value-type="float" office:value="38.0934" calcext:value-type="float">
            <text:p>3.81E+01</text:p>
          </table:table-cell>
          <table:table-cell table:style-name="ce4" office:value-type="float" office:value="-0.00149104" calcext:value-type="float">
            <text:p>-1.49E-03</text:p>
          </table:table-cell>
          <table:table-cell table:style-name="ce4" office:value-type="float" office:value="0.000000060619" calcext:value-type="float">
            <text:p>6.06E-08</text:p>
          </table:table-cell>
          <table:table-cell table:style-name="ce4" office:value-type="float" office:value="0" calcext:value-type="float">
            <text:p>0.00E+00</text:p>
          </table:table-cell>
          <table:table-cell table:style-name="Default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iO[l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4" office:value-type="float" office:value="-66150.4" calcext:value-type="float">
            <text:p>-6.62E+04</text:p>
          </table:table-cell>
          <table:table-cell table:style-name="ce4" office:value-type="float" office:value="35.8743" calcext:value-type="float">
            <text:p>3.59E+01</text:p>
          </table:table-cell>
          <table:table-cell table:style-name="ce4" office:value-type="float" office:value="-0.0019751" calcext:value-type="float">
            <text:p>-1.98E-03</text:p>
          </table:table-cell>
          <table:table-cell table:style-name="ce4" office:value-type="float" office:value="0.000000233017" calcext:value-type="float">
            <text:p>2.33E-07</text:p>
          </table:table-cell>
          <table:table-cell table:style-name="ce4" office:value-type="float" office:value="-0.0000000000121467" calcext:value-type="float">
            <text:p>-1.21E-11</text:p>
          </table:table-cell>
          <table:table-cell table:style-name="Default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OH[s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46" calcext:value-type="float">
            <text:p>1.46</text:p>
          </table:table-cell>
          <table:table-cell table:style-name="Default" table:number-columns-repeated="2"/>
          <table:table-cell table:style-name="ce4" office:value-type="float" office:value="-30106.2" calcext:value-type="float">
            <text:p>-3.01E+04</text:p>
          </table:table-cell>
          <table:table-cell table:style-name="ce4" office:value-type="float" office:value="33.7718" calcext:value-type="float">
            <text:p>3.38E+01</text:p>
          </table:table-cell>
          <table:table-cell table:style-name="ce4" office:value-type="float" office:value="0.000966853" calcext:value-type="float">
            <text:p>9.67E-04</text:p>
          </table:table-cell>
          <table:table-cell table:style-name="ce4" office:value-type="float" office:value="-0.0000020232" calcext:value-type="float">
            <text:p>-2.02E-06</text:p>
          </table:table-cell>
          <table:table-cell table:style-name="ce4" office:value-type="float" office:value="0.000000000534064" calcext:value-type="float">
            <text:p>5.34E-10</text:p>
          </table:table-cell>
          <table:table-cell table:style-name="Default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OH[l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2"/>
          <table:table-cell table:style-name="ce4" office:value-type="float" office:value="-28767.7" calcext:value-type="float">
            <text:p>-2.88E+04</text:p>
          </table:table-cell>
          <table:table-cell table:style-name="ce4" office:value-type="float" office:value="34.2848" calcext:value-type="float">
            <text:p>3.43E+01</text:p>
          </table:table-cell>
          <table:table-cell table:style-name="ce4" office:value-type="float" office:value="-0.0038158" calcext:value-type="float">
            <text:p>-3.82E-03</text:p>
          </table:table-cell>
          <table:table-cell table:style-name="ce4" office:value-type="float" office:value="0.000000539401" calcext:value-type="float">
            <text:p>5.39E-07</text:p>
          </table:table-cell>
          <table:table-cell table:style-name="ce4" office:value-type="float" office:value="0" calcext:value-type="float">
            <text:p>0.00E+00</text:p>
          </table:table-cell>
          <table:table-cell table:style-name="Default"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O[s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/>
          <table:table-cell table:style-name="Default" office:value-type="float" office:value="3404" calcext:value-type="float">
            <text:p>3404</text:p>
          </table:table-cell>
          <table:table-cell table:style-name="ce4" office:value-type="float" office:value="-67460.3" calcext:value-type="float">
            <text:p>-6.75E+04</text:p>
          </table:table-cell>
          <table:table-cell table:style-name="ce4" office:value-type="float" office:value="38.2717" calcext:value-type="float">
            <text:p>3.83E+01</text:p>
          </table:table-cell>
          <table:table-cell table:style-name="ce4" office:value-type="float" office:value="-0.00278551" calcext:value-type="float">
            <text:p>-2.79E-03</text:p>
          </table:table-cell>
          <table:table-cell table:style-name="ce4" office:value-type="float" office:value="0.000000572078" calcext:value-type="float">
            <text:p>5.72E-07</text:p>
          </table:table-cell>
          <table:table-cell table:style-name="ce4" office:value-type="float" office:value="-0.000000000074184" calcext:value-type="float">
            <text:p>-7.42E-11</text:p>
          </table:table-cell>
          <table:table-cell table:style-name="Default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O[l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table:number-columns-repeated="2"/>
          <table:table-cell table:style-name="ce4" office:value-type="float" office:value="-60106.3" calcext:value-type="float">
            <text:p>-6.01E+04</text:p>
          </table:table-cell>
          <table:table-cell table:style-name="ce4" office:value-type="float" office:value="34.5413" calcext:value-type="float">
            <text:p>3.45E+01</text:p>
          </table:table-cell>
          <table:table-cell table:style-name="ce4" office:value-type="float" office:value="-0.00264854" calcext:value-type="float">
            <text:p>-2.65E-03</text:p>
          </table:table-cell>
          <table:table-cell table:style-name="ce4" office:value-type="float" office:value="0.000000470724" calcext:value-type="float">
            <text:p>4.71E-07</text:p>
          </table:table-cell>
          <table:table-cell table:style-name="ce4" office:value-type="float" office:value="-0.0000000000385068" calcext:value-type="float">
            <text:p>-3.85E-11</text:p>
          </table:table-cell>
          <table:table-cell table:style-name="Default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2O3[s]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95" calcext:value-type="float">
            <text:p>4.95</text:p>
          </table:table-cell>
          <table:table-cell table:style-name="Default" table:number-columns-repeated="2"/>
          <table:table-cell table:style-name="ce4" office:value-type="float" office:value="359474" calcext:value-type="float">
            <text:p>3.59E+05</text:p>
          </table:table-cell>
          <table:table-cell table:style-name="ce4" office:value-type="float" office:value="-4.09857" calcext:value-type="float">
            <text:p>-4.10E+00</text:p>
          </table:table-cell>
          <table:table-cell table:style-name="ce4" office:value-type="float" office:value="-64.8556" calcext:value-type="float">
            <text:p>-6.49E+01</text:p>
          </table:table-cell>
          <table:table-cell table:style-name="ce4" office:value-type="float" office:value="0.00473778" calcext:value-type="float">
            <text:p>4.74E-03</text:p>
          </table:table-cell>
          <table:table-cell table:style-name="ce4" office:value-type="float" office:value="-0.000000336133" calcext:value-type="float">
            <text:p>-3.36E-07</text:p>
          </table:table-cell>
          <table:table-cell table:style-name="Default"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2O4[s]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09" calcext:value-type="float">
            <text:p>4.09</text:p>
          </table:table-cell>
          <table:table-cell table:style-name="Default" table:number-columns-repeated="2"/>
          <table:table-cell table:style-name="ce4" office:value-type="float" office:value="414455" calcext:value-type="float">
            <text:p>4.14E+05</text:p>
          </table:table-cell>
          <table:table-cell table:style-name="ce4" office:value-type="float" office:value="-2.22575" calcext:value-type="float">
            <text:p>-2.23E+00</text:p>
          </table:table-cell>
          <table:table-cell table:style-name="ce4" office:value-type="float" office:value="-93.6637" calcext:value-type="float">
            <text:p>-9.37E+01</text:p>
          </table:table-cell>
          <table:table-cell table:style-name="ce4" office:value-type="float" office:value="0.00373856" calcext:value-type="float">
            <text:p>3.74E-03</text:p>
          </table:table-cell>
          <table:table-cell table:style-name="ce4" office:value-type="float" office:value="-0.000000264367" calcext:value-type="float">
            <text:p>-2.64E-07</text:p>
          </table:table-cell>
          <table:table-cell table:style-name="Default"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2O5[s]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7" calcext:value-type="float">
            <text:p>3.37</text:p>
          </table:table-cell>
          <table:table-cell table:style-name="Default" table:number-columns-repeated="2"/>
          <table:table-cell table:style-name="ce4" office:value-type="float" office:value="458651" calcext:value-type="float">
            <text:p>4.59E+05</text:p>
          </table:table-cell>
          <table:table-cell table:style-name="ce4" office:value-type="float" office:value="-6.83064" calcext:value-type="float">
            <text:p>-6.83E+00</text:p>
          </table:table-cell>
          <table:table-cell table:style-name="ce4" office:value-type="float" office:value="-82.284" calcext:value-type="float">
            <text:p>-8.23E+01</text:p>
          </table:table-cell>
          <table:table-cell table:style-name="ce4" office:value-type="float" office:value="0.00602078" calcext:value-type="float">
            <text:p>6.02E-03</text:p>
          </table:table-cell>
          <table:table-cell table:style-name="ce4" office:value-type="float" office:value="0" calcext:value-type="float">
            <text:p>0.00E+00</text:p>
          </table:table-cell>
          <table:table-cell table:style-name="Default"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S[s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9" calcext:value-type="float">
            <text:p>2.59</text:p>
          </table:table-cell>
          <table:table-cell table:style-name="Default" table:number-columns-repeated="2"/>
          <table:table-cell table:style-name="ce4" office:value-type="float" office:value="-81137.1" calcext:value-type="float">
            <text:p>-8.11E+04</text:p>
          </table:table-cell>
          <table:table-cell table:style-name="ce4" office:value-type="float" office:value="-928021" calcext:value-type="float">
            <text:p>-9.28E+05</text:p>
          </table:table-cell>
          <table:table-cell table:style-name="ce4" office:value-type="float" office:value="269.568" calcext:value-type="float">
            <text:p>2.70E+02</text:p>
          </table:table-cell>
          <table:table-cell table:style-name="ce4" office:value-type="float" office:value="-0.0071155" calcext:value-type="float">
            <text:p>-7.12E-03</text:p>
          </table:table-cell>
          <table:table-cell table:style-name="ce4" office:value-type="float" office:value="0.000000521453" calcext:value-type="float">
            <text:p>5.21E-07</text:p>
          </table:table-cell>
          <table:table-cell table:style-name="Default"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eS2[s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table:number-columns-repeated="2"/>
          <table:table-cell table:style-name="ce4" office:value-type="float" office:value="530142" calcext:value-type="float">
            <text:p>5.30E+05</text:p>
          </table:table-cell>
          <table:table-cell table:style-name="ce4" office:value-type="float" office:value="-1145240" calcext:value-type="float">
            <text:p>-1.15E+06</text:p>
          </table:table-cell>
          <table:table-cell table:style-name="ce4" office:value-type="float" office:value="472.929" calcext:value-type="float">
            <text:p>4.73E+02</text:p>
          </table:table-cell>
          <table:table-cell table:style-name="ce4" office:value-type="float" office:value="-0.00433681" calcext:value-type="float">
            <text:p>-4.34E-03</text:p>
          </table:table-cell>
          <table:table-cell table:style-name="ce4" office:value-type="float" office:value="-0.00000149521" calcext:value-type="float">
            <text:p>-1.50E-06</text:p>
          </table:table-cell>
          <table:table-cell table:style-name="Default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2S[s]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86" calcext:value-type="float">
            <text:p>1.86</text:p>
          </table:table-cell>
          <table:table-cell table:style-name="Default" table:number-columns-repeated="2"/>
          <table:table-cell table:style-name="ce4" office:value-type="float" office:value="1990530" calcext:value-type="float">
            <text:p>1.99E+06</text:p>
          </table:table-cell>
          <table:table-cell table:style-name="ce4" office:value-type="float" office:value="-870027" calcext:value-type="float">
            <text:p>-8.70E+05</text:p>
          </table:table-cell>
          <table:table-cell table:style-name="ce4" office:value-type="float" office:value="406.721" calcext:value-type="float">
            <text:p>4.07E+02</text:p>
          </table:table-cell>
          <table:table-cell table:style-name="ce4" office:value-type="float" office:value="-0.0278298" calcext:value-type="float">
            <text:p>-2.78E-02</text:p>
          </table:table-cell>
          <table:table-cell table:style-name="ce4" office:value-type="float" office:value="0" calcext:value-type="float">
            <text:p>0.00E+00</text:p>
          </table:table-cell>
          <table:table-cell table:style-name="Default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n[s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43" calcext:value-type="float">
            <text:p>7.43</text:p>
          </table:table-cell>
          <table:table-cell table:style-name="Default" table:number-columns-repeated="2"/>
          <table:table-cell table:style-name="ce4" office:value-type="float" office:value="-34131.6" calcext:value-type="float">
            <text:p>-3.41E+04</text:p>
          </table:table-cell>
          <table:table-cell table:style-name="ce4" office:value-type="float" office:value="31.2732" calcext:value-type="float">
            <text:p>3.13E+01</text:p>
          </table:table-cell>
          <table:table-cell table:style-name="ce4" office:value-type="float" office:value="-0.000559461" calcext:value-type="float">
            <text:p>-5.59E-04</text:p>
          </table:table-cell>
          <table:table-cell table:style-name="ce4" office:value-type="float" office:value="-0.000000463498" calcext:value-type="float">
            <text:p>-4.63E-07</text:p>
          </table:table-cell>
          <table:table-cell table:style-name="ce4" office:value-type="float" office:value="0.000000000101677" calcext:value-type="float">
            <text:p>1.02E-10</text:p>
          </table:table-cell>
          <table:table-cell table:style-name="Default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n[l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table:number-columns-repeated="2"/>
          <table:table-cell table:style-name="ce4" office:value-type="float" office:value="-32220.7" calcext:value-type="float">
            <text:p>-3.22E+04</text:p>
          </table:table-cell>
          <table:table-cell table:style-name="ce4" office:value-type="float" office:value="30.188" calcext:value-type="float">
            <text:p>3.02E+01</text:p>
          </table:table-cell>
          <table:table-cell table:style-name="ce4" office:value-type="float" office:value="-0.00114796" calcext:value-type="float">
            <text:p>-1.15E-03</text:p>
          </table:table-cell>
          <table:table-cell table:style-name="ce4" office:value-type="float" office:value="-0.0000000302939" calcext:value-type="float">
            <text:p>-3.03E-08</text:p>
          </table:table-cell>
          <table:table-cell table:style-name="ce4" office:value-type="float" office:value="0.000000000021583" calcext:value-type="float">
            <text:p>2.16E-1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nS[s]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08" calcext:value-type="float">
            <text:p>4.08</text:p>
          </table:table-cell>
          <table:table-cell table:style-name="Default" table:number-columns-repeated="2"/>
          <table:table-cell table:style-name="ce4" office:value-type="float" office:value="112482" calcext:value-type="float">
            <text:p>1.12E+05</text:p>
          </table:table-cell>
          <table:table-cell table:style-name="ce4" office:value-type="float" office:value="-181938" calcext:value-type="float">
            <text:p>-1.82E+05</text:p>
          </table:table-cell>
          <table:table-cell table:style-name="ce4" office:value-type="float" office:value="58.7107" calcext:value-type="float">
            <text:p>5.87E+01</text:p>
          </table:table-cell>
          <table:table-cell table:style-name="ce4" office:value-type="float" office:value="0.000088936" calcext:value-type="float">
            <text:p>8.89E-05</text:p>
          </table:table-cell>
          <table:table-cell table:style-name="ce4" office:value-type="float" office:value="-0.00000000420876" calcext:value-type="float">
            <text:p>-4.21E-09</text:p>
          </table:table-cell>
          <table:table-cell table:style-name="Default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i[s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.91" calcext:value-type="float">
            <text:p>8.91</text:p>
          </table:table-cell>
          <table:table-cell table:style-name="Default"/>
          <table:table-cell table:style-name="Default" office:value-type="float" office:value="2915" calcext:value-type="float">
            <text:p>2915</text:p>
          </table:table-cell>
          <table:table-cell table:style-name="ce4" office:value-type="float" office:value="-51772.6" calcext:value-type="float">
            <text:p>-5.18E+04</text:p>
          </table:table-cell>
          <table:table-cell table:style-name="ce4" office:value-type="float" office:value="32.5355" calcext:value-type="float">
            <text:p>3.25E+01</text:p>
          </table:table-cell>
          <table:table-cell table:style-name="ce4" office:value-type="float" office:value="-0.000854276" calcext:value-type="float">
            <text:p>-8.54E-04</text:p>
          </table:table-cell>
          <table:table-cell table:style-name="ce4" office:value-type="float" office:value="0.000000193715" calcext:value-type="float">
            <text:p>1.94E-07</text:p>
          </table:table-cell>
          <table:table-cell table:style-name="ce4" office:value-type="float" office:value="-0.0000000000372769" calcext:value-type="float">
            <text:p>-3.73E-11</text:p>
          </table:table-cell>
          <table:table-cell table:style-name="Default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i[l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81" calcext:value-type="float">
            <text:p>7.81</text:p>
          </table:table-cell>
          <table:table-cell table:style-name="Default" table:number-columns-repeated="2"/>
          <table:table-cell table:style-name="ce4" office:value-type="float" office:value="-49657.9" calcext:value-type="float">
            <text:p>-4.97E+04</text:p>
          </table:table-cell>
          <table:table-cell table:style-name="ce4" office:value-type="float" office:value="30.9204" calcext:value-type="float">
            <text:p>3.09E+01</text:p>
          </table:table-cell>
          <table:table-cell table:style-name="ce4" office:value-type="float" office:value="-0.000280251" calcext:value-type="float">
            <text:p>-2.80E-04</text:p>
          </table:table-cell>
          <table:table-cell table:style-name="ce4" office:value-type="float" office:value="-0.000000100993" calcext:value-type="float">
            <text:p>-1.01E-07</text:p>
          </table:table-cell>
          <table:table-cell table:style-name="ce4" office:value-type="float" office:value="0.0000000000163913" calcext:value-type="float">
            <text:p>1.64E-1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r[s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19" calcext:value-type="float">
            <text:p>7.19</text:p>
          </table:table-cell>
          <table:table-cell table:style-name="Default"/>
          <table:table-cell table:style-name="Default" office:value-type="float" office:value="2981" calcext:value-type="float">
            <text:p>2981</text:p>
          </table:table-cell>
          <table:table-cell table:style-name="ce4" office:value-type="float" office:value="-47845.5" calcext:value-type="float">
            <text:p>-4.78E+04</text:p>
          </table:table-cell>
          <table:table-cell table:style-name="ce4" office:value-type="float" office:value="32.2423" calcext:value-type="float">
            <text:p>3.22E+01</text:p>
          </table:table-cell>
          <table:table-cell table:style-name="ce4" office:value-type="float" office:value="-0.00052871" calcext:value-type="float">
            <text:p>-5.29E-04</text:p>
          </table:table-cell>
          <table:table-cell table:style-name="ce4" office:value-type="float" office:value="-0.0000000617347" calcext:value-type="float">
            <text:p>-6.17E-08</text:p>
          </table:table-cell>
          <table:table-cell table:style-name="ce4" office:value-type="float" office:value="0.00000000000288469" calcext:value-type="float">
            <text:p>2.88E-12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r[l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table:number-columns-repeated="2"/>
          <table:table-cell table:style-name="ce4" office:value-type="float" office:value="-44771.2" calcext:value-type="float">
            <text:p>-4.48E+04</text:p>
          </table:table-cell>
          <table:table-cell table:style-name="ce4" office:value-type="float" office:value="30.9753" calcext:value-type="float">
            <text:p>3.10E+01</text:p>
          </table:table-cell>
          <table:table-cell table:style-name="ce4" office:value-type="float" office:value="-0.000784094" calcext:value-type="float">
            <text:p>-7.84E-04</text:p>
          </table:table-cell>
          <table:table-cell table:style-name="ce4" office:value-type="float" office:value="-0.00000000059258" calcext:value-type="float">
            <text:p>-5.93E-10</text:p>
          </table:table-cell>
          <table:table-cell table:style-name="ce4" office:value-type="float" office:value="0.0000000000125866" calcext:value-type="float">
            <text:p>1.26E-11</text:p>
          </table:table-cell>
          <table:table-cell table:style-name="Default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rN[s]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09" calcext:value-type="float">
            <text:p>6.09</text:p>
          </table:table-cell>
          <table:table-cell table:style-name="Default" table:number-columns-repeated="2"/>
          <table:table-cell table:style-name="ce4" office:value-type="float" office:value="-75124.6" calcext:value-type="float">
            <text:p>-7.51E+04</text:p>
          </table:table-cell>
          <table:table-cell table:style-name="ce4" office:value-type="float" office:value="38.8434" calcext:value-type="float">
            <text:p>3.88E+01</text:p>
          </table:table-cell>
          <table:table-cell table:style-name="ce4" office:value-type="float" office:value="-0.00348286" calcext:value-type="float">
            <text:p>-3.48E-03</text:p>
          </table:table-cell>
          <table:table-cell table:style-name="ce4" office:value-type="float" office:value="0.00000112997" calcext:value-type="float">
            <text:p>1.13E-06</text:p>
          </table:table-cell>
          <table:table-cell table:style-name="ce4" office:value-type="float" office:value="-0.000000000166901" calcext:value-type="float">
            <text:p>-1.67E-10</text:p>
          </table:table-cell>
          <table:table-cell table:style-name="Default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SiO3[s]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91" calcext:value-type="float">
            <text:p>2.91</text:p>
          </table:table-cell>
          <table:table-cell table:style-name="Default" table:number-columns-repeated="2"/>
          <table:table-cell table:style-name="ce4" office:value-type="float" office:value="360350" calcext:value-type="float">
            <text:p>3.60E+05</text:p>
          </table:table-cell>
          <table:table-cell table:style-name="ce4" office:value-type="float" office:value="-6.69046" calcext:value-type="float">
            <text:p>-6.69E+00</text:p>
          </table:table-cell>
          <table:table-cell table:style-name="ce4" office:value-type="float" office:value="-45.7724" calcext:value-type="float">
            <text:p>-4.58E+01</text:p>
          </table:table-cell>
          <table:table-cell table:style-name="ce4" office:value-type="float" office:value="0.00714526" calcext:value-type="float">
            <text:p>7.15E-03</text:p>
          </table:table-cell>
          <table:table-cell table:style-name="ce4" office:value-type="float" office:value="-0.000000810884" calcext:value-type="float">
            <text:p>-8.11E-07</text:p>
          </table:table-cell>
          <table:table-cell table:style-name="Default"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TiO3[s]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98" calcext:value-type="float">
            <text:p>3.98</text:p>
          </table:table-cell>
          <table:table-cell table:style-name="Default" table:number-columns-repeated="2"/>
          <table:table-cell table:style-name="ce4" office:value-type="float" office:value="11910.7" calcext:value-type="float">
            <text:p>1.19E+04</text:p>
          </table:table-cell>
          <table:table-cell table:style-name="ce4" office:value-type="float" office:value="-730327" calcext:value-type="float">
            <text:p>-7.30E+05</text:p>
          </table:table-cell>
          <table:table-cell table:style-name="ce4" office:value-type="float" office:value="175.93" calcext:value-type="float">
            <text:p>1.76E+02</text:p>
          </table:table-cell>
          <table:table-cell table:style-name="ce4" office:value-type="float" office:value="-0.0028463" calcext:value-type="float">
            <text:p>-2.85E-03</text:p>
          </table:table-cell>
          <table:table-cell table:style-name="ce4" office:value-type="float" office:value="0.000000110392" calcext:value-type="float">
            <text:p>1.10E-07</text:p>
          </table:table-cell>
          <table:table-cell table:style-name="Default"/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iS[s]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37" calcext:value-type="float">
            <text:p>5.37</text:p>
          </table:table-cell>
          <table:table-cell table:style-name="Default" table:number-columns-repeated="2"/>
          <table:table-cell table:style-name="ce4" office:value-type="float" office:value="-43242.1" calcext:value-type="float">
            <text:p>-4.32E+04</text:p>
          </table:table-cell>
          <table:table-cell table:style-name="ce4" office:value-type="float" office:value="-189653" calcext:value-type="float">
            <text:p>-1.90E+05</text:p>
          </table:table-cell>
          <table:table-cell table:style-name="ce4" office:value-type="float" office:value="71.6749" calcext:value-type="float">
            <text:p>7.17E+01</text:p>
          </table:table-cell>
          <table:table-cell table:style-name="ce4" office:value-type="float" office:value="-0.00250684" calcext:value-type="float">
            <text:p>-2.51E-03</text:p>
          </table:table-cell>
          <table:table-cell table:style-name="ce4" office:value-type="float" office:value="0" calcext:value-type="float">
            <text:p>0.00E+00</text:p>
          </table:table-cell>
          <table:table-cell table:style-name="Default"/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iS2[s]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45" calcext:value-type="float">
            <text:p>4.45</text:p>
          </table:table-cell>
          <table:table-cell table:style-name="Default" table:number-columns-repeated="2"/>
          <table:table-cell table:style-name="ce4" office:value-type="float" office:value="0" calcext:value-type="float">
            <text:p>0.00E+00</text:p>
          </table:table-cell>
          <table:table-cell table:style-name="ce4" office:value-type="float" office:value="-266982" calcext:value-type="float">
            <text:p>-2.67E+05</text:p>
          </table:table-cell>
          <table:table-cell table:style-name="ce4" office:value-type="float" office:value="108.176" calcext:value-type="float">
            <text:p>1.08E+02</text:p>
          </table:table-cell>
          <table:table-cell table:style-name="ce4" office:value-type="float" office:value="-0.00196812" calcext:value-type="float">
            <text:p>-1.97E-03</text:p>
          </table:table-cell>
          <table:table-cell table:style-name="ce4" office:value-type="float" office:value="0" calcext:value-type="float">
            <text:p>0.00E+00</text:p>
          </table:table-cell>
          <table:table-cell table:style-name="Default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i3S2[s]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87" calcext:value-type="float">
            <text:p>5.87</text:p>
          </table:table-cell>
          <table:table-cell table:style-name="Default" table:number-columns-repeated="2"/>
          <table:table-cell table:style-name="ce4" office:value-type="float" office:value="312877" calcext:value-type="float">
            <text:p>3.13E+05</text:p>
          </table:table-cell>
          <table:table-cell table:style-name="ce4" office:value-type="float" office:value="-501379" calcext:value-type="float">
            <text:p>-5.01E+05</text:p>
          </table:table-cell>
          <table:table-cell table:style-name="ce4" office:value-type="float" office:value="214.522" calcext:value-type="float">
            <text:p>2.15E+02</text:p>
          </table:table-cell>
          <table:table-cell table:style-name="ce4" office:value-type="float" office:value="-0.0399302" calcext:value-type="float">
            <text:p>-3.99E-02</text:p>
          </table:table-cell>
          <table:table-cell table:style-name="ce4" office:value-type="float" office:value="0.00000788559" calcext:value-type="float">
            <text:p>7.89E-06</text:p>
          </table:table-cell>
          <table:table-cell table:style-name="Default"/>
          <table:table-cell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12:29:08.880995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9T11:00:36.821784957</meta:creation-date>
    <dc:date>2026-07-09T12:32:43.313246646</dc:date>
    <meta:editing-duration>PT34M43S</meta:editing-duration>
    <meta:editing-cycles>5</meta:editing-cycles>
    <meta:generator>LibreOffice/26.2.4.2$Linux_X86_64 LibreOffice_project/620$Build-2</meta:generator>
    <meta:document-statistic meta:table-count="2" meta:cell-count="1009" meta:object-count="0"/>
  </office:meta>
</office:document-meta>
</file>